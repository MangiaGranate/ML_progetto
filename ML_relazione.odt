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rsid="00095b91" officeooo:paragraph-rsid="00095b91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fb091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3fd74c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140088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1da7e0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35b23" officeooo:paragraph-rsid="00235b23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65e9a" officeooo:paragraph-rsid="00265e9a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716a0" officeooo:paragraph-rsid="002716a0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974b5" officeooo:paragraph-rsid="000fb091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64b04" officeooo:paragraph-rsid="002c8d43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4776a" officeooo:paragraph-rsid="0034776a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3fd74c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4c0dae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2c8d43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e3bbf" officeooo:paragraph-rsid="002e3bbf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c953d" style:font-size-asian="10.5pt" style:font-weight-asian="bold" style:font-size-complex="12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officeooo:rsid="00173ef4" officeooo:paragraph-rsid="002c8d43"/>
    </style:style>
    <style:style style:name="P25" style:family="paragraph" style:parent-style-name="Preformatted_20_Text">
      <style:paragraph-properties fo:text-align="start" style:justify-single-word="false"/>
      <style:text-properties fo:font-size="12pt" officeooo:paragraph-rsid="00315fc1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fo:font-size="12pt" officeooo:rsid="001aaa06" officeooo:paragraph-rsid="00315fc1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officeooo:paragraph-rsid="001da7e0"/>
    </style:style>
    <style:style style:name="P28" style:family="paragraph" style:parent-style-name="Preformatted_20_Text">
      <style:paragraph-properties fo:text-align="start" style:justify-single-word="false"/>
      <style:text-properties officeooo:paragraph-rsid="0021839c"/>
    </style:style>
    <style:style style:name="P29" style:family="paragraph" style:parent-style-name="Preformatted_20_Text">
      <style:paragraph-properties fo:text-align="start" style:justify-single-word="false"/>
      <style:text-properties officeooo:paragraph-rsid="002c8d43"/>
    </style:style>
    <style:style style:name="P30" style:family="paragraph" style:parent-style-name="Preformatted_20_Text">
      <style:paragraph-properties fo:text-align="start" style:justify-single-word="false"/>
      <style:text-properties officeooo:paragraph-rsid="002e3bbf"/>
    </style:style>
    <style:style style:name="P31" style:family="paragraph" style:parent-style-name="Preformatted_20_Text">
      <style:paragraph-properties fo:text-align="start" style:justify-single-word="false"/>
      <style:text-properties officeooo:paragraph-rsid="003c7708"/>
    </style:style>
    <style:style style:name="P32" style:family="paragraph" style:parent-style-name="Preformatted_20_Text">
      <style:paragraph-properties fo:text-align="start" style:justify-single-word="false"/>
      <style:text-properties officeooo:rsid="001e894f" officeooo:paragraph-rsid="001e894f"/>
    </style:style>
    <style:style style:name="P33" style:family="paragraph" style:parent-style-name="Preformatted_20_Text">
      <style:paragraph-properties fo:text-align="start" style:justify-single-word="false"/>
      <style:text-properties officeooo:rsid="0021faf8" officeooo:paragraph-rsid="0021faf8"/>
    </style:style>
    <style:style style:name="P34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fb091" style:font-size-asian="10.5pt" style:font-weight-asian="bold" style:font-size-complex="12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524397" style:font-size-asian="10.5pt" style:font-weight-asian="bold" style:font-size-complex="12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officeooo:paragraph-rsid="004e97ad"/>
    </style:style>
    <style:style style:name="P37" style:family="paragraph" style:parent-style-name="Preformatted_20_Text">
      <style:paragraph-properties fo:text-align="start" style:justify-single-word="false"/>
      <style:text-properties fo:font-size="12pt" fo:font-weight="normal" officeooo:rsid="004e97ad" officeooo:paragraph-rsid="004e97ad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ize="12pt" fo:font-weight="normal" officeooo:rsid="0051a6f0" officeooo:paragraph-rsid="0051a6f0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size="12pt" fo:font-weight="normal" officeooo:rsid="00524397" officeooo:paragraph-rsid="00524397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ize="12pt" fo:font-weight="normal" officeooo:rsid="005815a5" officeooo:paragraph-rsid="005815a5" style:font-size-asian="12pt" style:font-weight-asian="normal" style:font-size-complex="12pt" style:font-weight-complex="normal"/>
    </style:style>
    <style:style style:name="T1" style:family="text">
      <style:text-properties officeooo:rsid="0009ee97"/>
    </style:style>
    <style:style style:name="T2" style:family="text">
      <style:text-properties officeooo:rsid="0012f2f0"/>
    </style:style>
    <style:style style:name="T3" style:family="text">
      <style:text-properties fo:color="#000000" loext:opacity="100%" fo:font-size="12pt" fo:font-weight="normal" officeooo:rsid="00170580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size="12pt" fo:font-weight="normal" officeooo:rsid="00164b04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size="12pt" fo:font-weight="normal" officeooo:rsid="002c8d43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3a2655" style:font-size-asian="10.5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officeooo:rsid="003ae10a" style:font-size-asian="10.5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3c7708" style:font-size-asian="10.5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3d8a50" style:font-size-asian="10.5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3fc0e5" style:font-size-asian="10.5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4e97ad" style:font-size-asian="10.5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170580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1da7e0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21839c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bold" officeooo:rsid="002c97ac" style:font-size-asian="10.5pt" style:font-weight-asian="bold" style:font-size-complex="12pt" style:font-weight-complex="bold"/>
    </style:style>
    <style:style style:name="T17" style:family="text">
      <style:text-properties fo:color="#000000" loext:opacity="100%" fo:font-size="12pt" fo:font-weight="bold" officeooo:rsid="00170580" style:font-size-asian="12pt" style:font-weight-asian="bold" style:font-size-complex="12pt" style:font-weight-complex="bold"/>
    </style:style>
    <style:style style:name="T18" style:family="text">
      <style:text-properties fo:color="#000000" loext:opacity="100%" fo:font-weight="normal" officeooo:rsid="001aaa06" style:font-weight-asian="normal" style:font-weight-complex="normal"/>
    </style:style>
    <style:style style:name="T19" style:family="text">
      <style:text-properties fo:color="#000000" loext:opacity="100%" fo:font-weight="normal" officeooo:rsid="001da7e0" style:font-weight-asian="normal" style:font-weight-complex="normal"/>
    </style:style>
    <style:style style:name="T20" style:family="text">
      <style:text-properties officeooo:rsid="0018999d"/>
    </style:style>
    <style:style style:name="T21" style:family="text">
      <style:text-properties officeooo:rsid="0019b046"/>
    </style:style>
    <style:style style:name="T22" style:family="text">
      <style:text-properties officeooo:rsid="001aaa06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ff8ad" style:font-size-asian="12pt" style:font-size-complex="12pt"/>
    </style:style>
    <style:style style:name="T25" style:family="text">
      <style:text-properties fo:font-size="12pt" officeooo:rsid="0021839c" style:font-size-asian="12pt" style:font-size-complex="12pt"/>
    </style:style>
    <style:style style:name="T26" style:family="text">
      <style:text-properties fo:font-size="12pt" officeooo:rsid="0021faf8" style:font-size-asian="12pt" style:font-size-complex="12pt"/>
    </style:style>
    <style:style style:name="T27" style:family="text">
      <style:text-properties fo:font-size="12pt" officeooo:rsid="003d29b7" style:font-size-asian="12pt" style:font-size-complex="12pt"/>
    </style:style>
    <style:style style:name="T28" style:family="text">
      <style:text-properties fo:font-size="12pt" officeooo:rsid="003d8a50" style:font-size-asian="12pt" style:font-size-complex="12pt"/>
    </style:style>
    <style:style style:name="T29" style:family="text">
      <style:text-properties fo:font-size="12pt" officeooo:rsid="004e97ad" style:font-size-asian="12pt" style:font-size-complex="12pt"/>
    </style:style>
    <style:style style:name="T30" style:family="text">
      <style:text-properties fo:font-size="12pt" officeooo:rsid="0059db9a" style:font-size-asian="12pt" style:font-size-complex="12pt"/>
    </style:style>
    <style:style style:name="T31" style:family="text">
      <style:text-properties style:font-size-asian="12pt"/>
    </style:style>
    <style:style style:name="T32" style:family="text">
      <style:text-properties officeooo:rsid="001da7e0" style:font-size-asian="12pt"/>
    </style:style>
    <style:style style:name="T33" style:family="text">
      <style:text-properties officeooo:rsid="001e894f" style:font-size-asian="12pt"/>
    </style:style>
    <style:style style:name="T34" style:family="text">
      <style:text-properties officeooo:rsid="0028d61b" style:font-size-asian="12pt"/>
    </style:style>
    <style:style style:name="T35" style:family="text">
      <style:text-properties officeooo:rsid="002e3bbf" style:font-size-asian="12pt"/>
    </style:style>
    <style:style style:name="T36" style:family="text">
      <style:text-properties officeooo:rsid="002ff3be" style:font-size-asian="12pt"/>
    </style:style>
    <style:style style:name="T37" style:family="text">
      <style:text-properties officeooo:rsid="003d29b7" style:font-size-asian="12pt"/>
    </style:style>
    <style:style style:name="T38" style:family="text">
      <style:text-properties officeooo:rsid="003d8a50" style:font-size-asian="12pt"/>
    </style:style>
    <style:style style:name="T39" style:family="text">
      <style:text-properties officeooo:rsid="001dc92f"/>
    </style:style>
    <style:style style:name="T40" style:family="text">
      <style:text-properties officeooo:rsid="00235b23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4c714" style:font-weight-asian="bold" style:font-weight-complex="bold"/>
    </style:style>
    <style:style style:name="T43" style:family="text">
      <style:text-properties fo:font-weight="bold" officeooo:rsid="00265e9a" style:font-weight-asian="bold" style:font-weight-complex="bold"/>
    </style:style>
    <style:style style:name="T44" style:family="text">
      <style:text-properties fo:font-weight="bold" officeooo:rsid="002b352c" style:font-weight-asian="bold" style:font-weight-complex="bold"/>
    </style:style>
    <style:style style:name="T45" style:family="text">
      <style:text-properties fo:font-weight="bold" officeooo:rsid="003fd74c" style:font-weight-asian="bold" style:font-weight-complex="bold"/>
    </style:style>
    <style:style style:name="T46" style:family="text">
      <style:text-properties fo:font-weight="bold" officeooo:rsid="00112bdf" style:font-weight-asian="bold" style:font-weight-complex="bold"/>
    </style:style>
    <style:style style:name="T47" style:family="text">
      <style:text-properties fo:font-weight="bold" officeooo:rsid="004aa7b0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3f4cc7" style:font-weight-asian="normal" style:font-weight-complex="normal"/>
    </style:style>
    <style:style style:name="T50" style:family="text">
      <style:text-properties officeooo:rsid="00254d8e"/>
    </style:style>
    <style:style style:name="T51" style:family="text">
      <style:text-properties officeooo:rsid="00265e9a"/>
    </style:style>
    <style:style style:name="T52" style:family="text">
      <style:text-properties fo:color="#5b277d" loext:opacity="100%" fo:font-size="12pt" fo:font-weight="normal" officeooo:rsid="0021faf8" style:font-size-asian="12pt" style:font-weight-asian="normal" style:font-size-complex="12pt" style:font-weight-complex="normal"/>
    </style:style>
    <style:style style:name="T53" style:family="text">
      <style:text-properties officeooo:rsid="002ff3be"/>
    </style:style>
    <style:style style:name="T54" style:family="text">
      <style:text-properties officeooo:rsid="00338134"/>
    </style:style>
    <style:style style:name="T55" style:family="text">
      <style:text-properties officeooo:rsid="0035304e"/>
    </style:style>
    <style:style style:name="T56" style:family="text">
      <style:text-properties officeooo:rsid="00361d90"/>
    </style:style>
    <style:style style:name="T57" style:family="text">
      <style:text-properties officeooo:rsid="003f4cc7"/>
    </style:style>
    <style:style style:name="T58" style:family="text">
      <style:text-properties officeooo:rsid="0044c954"/>
    </style:style>
    <style:style style:name="T59" style:family="text">
      <style:text-properties officeooo:rsid="004c0dae"/>
    </style:style>
    <style:style style:name="T60" style:family="text">
      <style:text-properties officeooo:rsid="003a2655"/>
    </style:style>
    <style:style style:name="T61" style:family="text">
      <style:text-properties officeooo:rsid="004d671e"/>
    </style:style>
    <style:style style:name="T62" style:family="text">
      <style:text-properties officeooo:rsid="004e97ad"/>
    </style:style>
    <style:style style:name="T63" style:family="text">
      <style:text-properties officeooo:rsid="00522c29"/>
    </style:style>
    <style:style style:name="T64" style:family="text">
      <style:text-properties officeooo:rsid="0053a533"/>
    </style:style>
    <style:style style:name="T65" style:family="text">
      <style:text-properties officeooo:rsid="0056d06b"/>
    </style:style>
    <style:style style:name="T66" style:family="text">
      <style:text-properties officeooo:rsid="0057490e"/>
    </style:style>
    <style:style style:name="T67" style:family="text">
      <style:text-properties officeooo:rsid="0057be10"/>
    </style:style>
    <style:style style:name="T68" style:family="text">
      <style:text-properties officeooo:rsid="00585bd6"/>
    </style:style>
    <style:style style:name="T69" style:family="text">
      <style:text-properties officeooo:rsid="005aad9f"/>
    </style:style>
    <style:style style:name="T70" style:family="text">
      <style:text-properties officeooo:rsid="005b314a"/>
    </style:style>
    <style:style style:name="T71" style:family="text">
      <style:text-properties officeooo:rsid="005b3e16"/>
    </style:style>
    <style:style style:name="T72" style:family="text">
      <style:text-properties officeooo:rsid="005c71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_ML</text:p>
      <text:p text:style-name="P1"/>
      <text:p text:style-name="P1"/>
      <text:p text:style-name="P6"><text:tab/><text:tab/><text:tab/><text:span text:style-name="T44">Introduzione</text:span></text:p>
      <text:p text:style-name="P6"/>
      <text:p text:style-name="P6"><text:span text:style-name="T46">Informazioni sul </text:span><text:span text:style-name="T41">Dataset</text:span>:</text:p>
      <text:p text:style-name="P6">il dataset Iris offre 150 sample da 4 features float e una label che può assumere 3 classi di valori: Iris-setosa, Iris-versicolor e Iris-virginica.</text:p>
      <text:p text:style-name="P6">Il dataset è gia omogeneo in quanto offre 50 campioni per ogni classe e questo semplifica molto il lavoro.</text:p>
      <text:p text:style-name="P2"/>
      <text:p text:style-name="P2"/>
      <text:p text:style-name="P2">Il grande problema di questo dataset è che contiene pochi sample <text:span text:style-name="T1">(150)</text:span>, per questo motivo ho deciso di tenere solo il <text:span text:style-name="T1">10% (15)</text:span> <text:span text:style-name="T1">dei </text:span>campioni dei dati come testing set per il modello finale.</text:p>
      <text:p text:style-name="P2"/>
      <text:p text:style-name="P2">Sul training set ho deciso di <text:span text:style-name="T2">adottare la k-fold con k=</text:span><text:span text:style-name="T20">7</text:span><text:span text:style-name="T2"> per suddividere il dataset di training durante l’ottimizzazione degli iperparametri e la scelta del modello</text:span></text:p>
      <text:p text:style-name="P4"/>
      <text:p text:style-name="P4"/>
      <text:p text:style-name="P23"><text:tab/><text:tab/><text:span text:style-name="T54">Scelte dei modelli da testare</text:span></text:p>
      <text:p text:style-name="P23"/>
      <text:p text:style-name="P16">Trattandosi di un task di classificazione <text:span text:style-name="T55">multiclasse </text:span><text:span text:style-name="T56">sicuramente vorrei testare i modelli DecisionTreeClassifier() e KneighborsClassifier(); oltre a questi vorrei testare un modello 1-vs-all.</text:span></text:p>
      <text:p text:style-name="P16"/>
      <text:p text:style-name="P17"><text:span text:style-name="T56">DecisionTreeClassifier </text:span>e <text:span text:style-name="T56">KneighborsClassifier </text:span>verranno ottimizzate singolarmente in quanto gia supportano il multiclass; per quanto riguarda il metodo 1-vs-all non voglio usare la soluzione di sklearn OneVsRestClassifier() perché mi vincola ad usare l<text:span text:style-name="T58">a stessa tipologia di</text:span> modello per tutte le calssi.</text:p>
      <text:p text:style-name="P17"/>
      <text:p text:style-name="P31"><text:span text:style-name="T6">Tra le informazioni del dataset </text:span><text:span text:style-name="T9">(Iris.names)</text:span><text:span text:style-name="T6"> </text:span><text:span text:style-name="T7">ho appreso che una delle 3 classi è liearmente separabile </text:span><text:span text:style-name="T9">dalle altre </text:span><text:span text:style-name="T8">quindi tra i modelli da </text:span><text:span text:style-name="T9">scegliere</text:span><text:span text:style-name="T8"> per ogni classe userò un</text:span><text:span text:style-name="T10"> </text:span><text:span text:style-name="Source_20_Text"><text:span text:style-name="T23">LogisticRegression</text:span></text:span><text:span text:style-name="Source_20_Text"><text:span text:style-name="T27">() </text:span></text:span><text:span text:style-name="Source_20_Text"><text:span text:style-name="T28">e un </text:span></text:span><text:span text:style-name="Source_20_Text"><text:span text:style-name="Strong_20_Emphasis"><text:span text:style-name="T48">SVC</text:span></text:span></text:span><text:span text:style-name="Source_20_Text"><text:span text:style-name="T49">()</text:span></text:span></text:p>
      <text:p text:style-name="P4"/>
      <text:p text:style-name="P4"><text:tab/><text:tab/><text:span text:style-name="T45">1-vs-all</text:span></text:p>
      <text:p text:style-name="P4"><text:span text:style-name="T45"/></text:p>
      <text:p text:style-name="P18">Per i metodi 1-vs-all testerò i due modelli <text:span text:style-name="Source_20_Text"><text:span text:style-name="T31">LogisticRegression</text:span></text:span><text:span text:style-name="Source_20_Text"><text:span text:style-name="T37">() </text:span></text:span><text:span text:style-name="Source_20_Text"><text:span text:style-name="T38">e </text:span></text:span><text:span text:style-name="Strong_20_Emphasis"><text:span text:style-name="T48">SVC</text:span></text:span><text:span text:style-name="Source_20_Text"><text:span text:style-name="T57">() </text:span></text:span><text:span text:style-name="Source_20_Text">per ogni classe scegliendo quello più performante.</text:span></text:p>
      <text:p text:style-name="P19"><text:span text:style-name="Source_20_Text"><text:span text:style-name="T59">La funzione di aggregazione che interpreterà i modelli (gia ottimizzati) deve essere fatta a mano visti i limiti di <text:s/></text:span></text:span><text:span text:style-name="Source_20_Text"><text:span text:style-name="T60">OneVsRestClassifier</text:span></text:span><text:span text:style-name="Source_20_Text"><text:span text:style-name="T59">()</text:span></text:span></text:p>
      <text:p text:style-name="P18"><text:span text:style-name="Source_20_Text"/></text:p>
      <text:p text:style-name="P18"><text:span text:style-name="Source_20_Text"><text:span text:style-name="T41">fun aggregazione 1-vs-all –</text:span></text:span><text:span text:style-name="Source_20_Text"> </text:span><text:span text:style-name="Source_20_Text"><text:span text:style-name="T61">Ottimizzati 3 modelli di classificazione binaria serve interpretare i loro punteggi di probabilità di appartenenza alla classe per restituire la classe </text:span></text:span><text:soft-page-break/><text:span text:style-name="Source_20_Text"><text:span text:style-name="T61">più probabile.</text:span></text:span><text:span text:style-name="Source_20_Text"> </text:span></text:p>
      <text:p text:style-name="P5"/>
      <text:p text:style-name="P4"><text:tab/><text:tab/></text:p>
      <text:p text:style-name="P4"/>
      <text:p text:style-name="P4"/>
      <text:p text:style-name="P4"/>
      <text:p text:style-name="P30"><text:span text:style-name="T4"><text:tab/><text:tab/></text:span><text:span text:style-name="T17">_valutatore_kfold</text:span><text:span text:style-name="T16">()</text:span></text:p>
      <text:p text:style-name="P29"><text:span text:style-name="T4"/></text:p>
      <text:p text:style-name="P29"><text:span text:style-name="T4">FONTE:<text:tab/></text:span><text:a xlink:type="simple" xlink:href="https://scikit-learn.org/stable/modules/generated/sklearn.model_selection.StratifiedKFold.html" text:style-name="Internet_20_link" text:visited-style-name="Visited_20_Internet_20_Link"><text:span text:style-name="T5">doc StratifiedKFold</text:span></text:a></text:p>
      <text:p text:style-name="P14"/>
      <text:p text:style-name="P29"><text:span text:style-name="T3">Inizialmente ho pensato di implementare le funzioni del cross validation a mano per rendere i passaggi espliciti e per questo ho deciso di definire </text:span><text:span text:style-name="T13">“_valutatore_kfold”.</text:span></text:p>
      <text:p text:style-name="P29"><text:span text:style-name="T13"/></text:p>
      <text:p text:style-name="P24"><text:span text:style-name="T13">“_valutatore_kfold” </text:span><text:span text:style-name="T12">si occupa di testare un modello gia definito (iperparametri gia fissati) in k-fold omogenei, restituendo la media dei valutatori.</text:span></text:p>
      <text:p text:style-name="P24"><text:span text:style-name="T12"/></text:p>
      <text:p text:style-name="P20">L’idea era quella di chiamare “_valutatore_kfold” all’interno di un ciclo che testasse per ogni modello le varie combinazioni di iperparametri.</text:p>
      <text:p text:style-name="P20"/>
      <text:p text:style-name="P21">Ad ogni fold il dataset veniva partizionato tramite S<text:span text:style-name="T53">tratifiedKFold() che, a differenza di Kfold(), divide il dataset in sottogruppi omogenei.</text:span></text:p>
      <text:p text:style-name="P13"/>
      <text:p text:style-name="P13"/>
      <text:p text:style-name="P15">In seguito ho deciso però di adottare le funzioni di libreria e tenere _valutatore_kfold come dimostrazione del funzionamento di <text:span text:style-name="T35">S</text:span><text:span text:style-name="T36">tratifiedKFold()</text:span></text:p>
      <text:p text:style-name="P22"/>
      <text:p text:style-name="P25"><text:span text:style-name="T18">L’ottimizzazione degli iperparametri è eseguita tramite la funzione </text:span><text:span text:style-name="T19">GridSearchCV</text:span><text:span text:style-name="T22">().</text:span></text:p>
      <text:p text:style-name="P26"><text:span text:style-name="T53">Questa funzione esegue l’intero processo di cross validation </text:span><text:span text:style-name="T39">variando gli iperparametri e provando tutte le combinazioni fornite.</text:span></text:p>
      <text:p text:style-name="P3"><text:tab/></text:p>
      <text:p text:style-name="P3"><text:tab/><text:tab/><text:span text:style-name="T42">Configurazione di GridSearchCV()</text:span></text:p>
      <text:p text:style-name="P3"/>
      <text:p text:style-name="P8">FONDE:<text:tab/><text:a xlink:type="simple" xlink:href="https://scikit-learn.org/stable/modules/generated/sklearn.model_selection.GridSearchCV.html" text:style-name="Internet_20_link" text:visited-style-name="Visited_20_Internet_20_Link"><text:span text:style-name="T32">doc GridSearchCV</text:span></text:a></text:p>
      <text:p text:style-name="P28"><text:span text:style-name="T14">F</text:span><text:span text:style-name="T15">ONDE:<text:tab/></text:span><text:a xlink:type="simple" xlink:href="https://scikit-learn.org/stable/modules/compose.html#combining-estimators" text:style-name="Internet_20_link" text:visited-style-name="Visited_20_Internet_20_Link"><text:span text:style-name="T52">doc Pipeline</text:span></text:a></text:p>
      <text:p text:style-name="P8"><text:span text:style-name="T32"/></text:p>
      <text:p text:style-name="P27"><text:span text:style-name="T14"/></text:p>
      <text:p text:style-name="P8"><text:span text:style-name="T32"/></text:p>
      <text:p text:style-name="P32"><text:span text:style-name="T23">La voce estimator di GridSearchCV ci permette di </text:span><text:span text:style-name="T24">specificare quale modello utilizzare nell’ottimizzazione, in particolare estimator deve essere una funzione che implementi il metodo .fit() per accettare i dati ti training e il metodo .predict() per </text:span><text:span text:style-name="T25">poter </text:span><text:span text:style-name="T26">confrontare il modello con i dati di testing/validator.</text:span></text:p>
      <text:p text:style-name="P33"><text:span text:style-name="T23"/></text:p>
      <text:p text:style-name="P9">La voce cv di <text:span text:style-name="T33">GridSearchCV </text:span><text:span text:style-name="T31">ci permette di specificare la procedura di testing del modello (non le metriche da usare che invece sono scelte in scoring); in particolare ho deciso di usare la funzione </text:span><text:soft-page-break/><text:span text:style-name="T21">StratifierKFold() </text:span>per ottenere fold omogenei.</text:p>
      <text:p text:style-name="P9"/>
      <text:p text:style-name="P9">In fine per i modelli che necessitano di scalamento voglio che ad ogni fold i dati di training e validator vengano scalati basandosi sui soli dati di training; per fare questo fornisco all’estimator di GridSearchCV una pipeline.</text:p>
      <text:p text:style-name="P9"/>
      <text:p text:style-name="P9"><text:span text:style-name="T43">Pipeline </text:span><text:span text:style-name="T47">di Sklearn</text:span><text:span text:style-name="T51"> - </text:span>L’oggetto Pipeline di sklearn ci permette di concatenare più <text:span text:style-name="T40">oggetti</text:span> <text:span text:style-name="T40">sklearn che verranno eseguite in successione ad ogni fold.</text:span></text:p>
      <text:p text:style-name="P9"/>
      <text:p text:style-name="P10">Nello specifico si definisce una lista di oggetti <text:span text:style-name="T50">i quali devono avere i metodi .fit() e .transform(); l’ultimo oggetto può avere .predict() (cioè deve essere un "estimatore", come un classificatore o un regressore).</text:span></text:p>
      <text:p text:style-name="P10"/>
      <text:p text:style-name="P12">Nel nostro caso, per i modelli che ne hanno bisogno, passiamo a <text:s/><text:span text:style-name="T32">GridSearchCV</text:span><text:span text:style-name="T31">() una pipeline contenente uno scaler in modo da scalare i dati per ogni fold ed evitare che </text:span><text:span text:style-name="T34">la dimenzione delle features infuenzi la loro importanza a training time.</text:span></text:p>
      <text:p text:style-name="P10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. Inizio leggendo il file csv e suddividendo il dataset in Training e Testing senza normalizzare i valori. In seguito nella cross validation useremo la k-fold per suddividere il Training set in più fold con i Validato.</text:p>
      <text:p text:style-name="P7"/>
      <text:p text:style-name="P7"/>
      <text:p text:style-name="P34"><text:soft-page-break/><text:tab/><text:tab/><text:span text:style-name="T68">Ricerca della classe linearmente separabile</text:span></text:p>
      <text:p text:style-name="P34"/>
      <text:p text:style-name="P36"><text:span text:style-name="T11">Durante la cross validation del modello </text:span><text:span text:style-name="T23">LogisticRegression </text:span><text:span text:style-name="T29">sono stati ottimizzati gli iperparametri per ognuna delle tre possibili classi; tuttavia è risultata un accuratezza </text:span><text:span text:style-name="T30">sospetta</text:span><text:span text:style-name="T29"> del 100% sulla classe “Iris-setosa”</text:span></text:p>
      <text:p text:style-name="P36"><text:span text:style-name="T29"/></text:p>
      <text:p text:style-name="P37">log:</text:p>
      <text:p text:style-name="P37"/>
      <text:p text:style-name="P37">Fitting 5 folds for each of 96 candidates, totalling 480 fits</text:p>
      <text:p text:style-name="P37">LogisticRegression(Iris-setosa)-----------------------------------------------------------------------------------------</text:p>
      <text:p text:style-name="P37">iperparametri migliori: <text:s/>{'modello__C': 0.001, 'modello__class_weight': None, 'modello__max_iter': 1000, 'modello__penalty': 'l2', 'modello__solver': 'liblinear', 'modello__tol': 0.0001}</text:p>
      <text:p text:style-name="P37">accuratezza del modello: 1.0</text:p>
      <text:p text:style-name="P37">=============================</text:p>
      <text:p text:style-name="P37"/>
      <text:p text:style-name="P38">Mentre le altre due classi hanno ricevuto un accuratezza di 0.72 0.96. Dal momento che, <text:span text:style-name="T69">dagli appunti del dataset,</text:span> una delle classi è linearmente separabile dalle altre non è detto che si tratti di un caso di Overfitting ma per <text:span text:style-name="T63">sicurezza ho ritenuto opportuno testare il modello con i dati di testing sul quale non è stato allenato. </text:span></text:p>
      <text:p text:style-name="P38"/>
      <text:p text:style-name="P39">Dal testing risulta un accuratezza di 0.95; come prima ipotesi mi sembra corretto dire che la classe “Iris-setosa” sia <text:span text:style-name="T64">tra le tre </text:span>quella linearmente separabile dalle altre; tuttavia un punteggio di 0.96 della classe “Iris-virignia” <text:span text:style-name="T70">(ottenuto in cross validation)</text:span> è sospetto <text:span text:style-name="T71">per una classe che non dovrebbe esserlo</text:span>. Ho deciso di testare con il dataset di testing anche questa classe per vedere se l’accuratezza scende.</text:p>
      <text:p text:style-name="P39"><text:line-break/><text:span text:style-name="T65">Alla fine del test sul modello Virginia ho ottenuto un accuratezza dello 0.</text:span><text:span text:style-name="T66">64</text:span><text:span text:style-name="T65">; ne deduco che questa classe non sia </text:span><text:span text:style-name="T67">perfettamente </text:span><text:span text:style-name="T65">separabile </text:span><text:span text:style-name="T67">linearmente</text:span><text:span text:style-name="T65"> dalle altre.</text:span></text:p>
      <text:p text:style-name="P39"/>
      <text:p text:style-name="P40"><text:span text:style-name="T41">Conclusione</text:span> - Basandomi sui risultati ottenuti su questi due test ho deciso che per il modello 1-vs-all utilizzerò LogReg per la classe “Iris-setosa” e SVC per le altre due.</text:p>
      <text:p text:style-name="P35"/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1T11:10:53.773319188</dc:date>
    <meta:editing-duration>PT10H24M</meta:editing-duration>
    <meta:editing-cycles>90</meta:editing-cycles>
    <meta:generator>LibreOffice/24.2.7.2$Linux_X86_64 LibreOffice_project/420$Build-2</meta:generator>
    <meta:document-statistic meta:table-count="0" meta:image-count="0" meta:object-count="0" meta:page-count="4" meta:paragraph-count="48" meta:word-count="916" meta:character-count="6327" meta:non-whitespace-character-count="5434"/>
  </office:meta>
</office:document-meta>
</file>