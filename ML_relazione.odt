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rsid="00095b91" officeooo:paragraph-rsid="00095b91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fb091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c953d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3fd74c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140088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0580" officeooo:paragraph-rsid="00170580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c7a22" officeooo:paragraph-rsid="001da7e0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1faf8" officeooo:paragraph-rsid="0021faf8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35b23" officeooo:paragraph-rsid="00235b23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65e9a" officeooo:paragraph-rsid="00265e9a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716a0" officeooo:paragraph-rsid="002716a0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974b5" officeooo:paragraph-rsid="000fb091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64b04" officeooo:paragraph-rsid="002c8d43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4776a" officeooo:paragraph-rsid="0034776a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a2655" officeooo:paragraph-rsid="003a2655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3fd74c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3ef4" officeooo:paragraph-rsid="00164b04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3ef4" officeooo:paragraph-rsid="002c8d43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e3bbf" officeooo:paragraph-rsid="002e3bbf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c953d" style:font-size-asian="10.5pt" style:font-weight-asian="bold" style:font-size-complex="12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officeooo:rsid="00173ef4" officeooo:paragraph-rsid="00173ef4"/>
    </style:style>
    <style:style style:name="P26" style:family="paragraph" style:parent-style-name="Preformatted_20_Text">
      <style:paragraph-properties fo:text-align="start" style:justify-single-word="false"/>
      <style:text-properties officeooo:rsid="00173ef4" officeooo:paragraph-rsid="002c8d43"/>
    </style:style>
    <style:style style:name="P27" style:family="paragraph" style:parent-style-name="Preformatted_20_Text">
      <style:paragraph-properties fo:text-align="start" style:justify-single-word="false"/>
      <style:text-properties fo:font-size="12pt" officeooo:paragraph-rsid="00315fc1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fo:font-size="12pt" officeooo:rsid="001aaa06" officeooo:paragraph-rsid="00315fc1" style:font-size-asian="12pt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officeooo:paragraph-rsid="001da7e0"/>
    </style:style>
    <style:style style:name="P30" style:family="paragraph" style:parent-style-name="Preformatted_20_Text">
      <style:paragraph-properties fo:text-align="start" style:justify-single-word="false"/>
      <style:text-properties officeooo:paragraph-rsid="0021839c"/>
    </style:style>
    <style:style style:name="P31" style:family="paragraph" style:parent-style-name="Preformatted_20_Text">
      <style:paragraph-properties fo:text-align="start" style:justify-single-word="false"/>
      <style:text-properties officeooo:paragraph-rsid="002c8d43"/>
    </style:style>
    <style:style style:name="P32" style:family="paragraph" style:parent-style-name="Preformatted_20_Text">
      <style:paragraph-properties fo:text-align="start" style:justify-single-word="false"/>
      <style:text-properties officeooo:paragraph-rsid="002e3bbf"/>
    </style:style>
    <style:style style:name="P33" style:family="paragraph" style:parent-style-name="Preformatted_20_Text">
      <style:paragraph-properties fo:text-align="start" style:justify-single-word="false"/>
      <style:text-properties officeooo:paragraph-rsid="003c7708"/>
    </style:style>
    <style:style style:name="P34" style:family="paragraph" style:parent-style-name="Preformatted_20_Text">
      <style:paragraph-properties fo:text-align="start" style:justify-single-word="false"/>
      <style:text-properties officeooo:rsid="001e894f" officeooo:paragraph-rsid="001e894f"/>
    </style:style>
    <style:style style:name="P35" style:family="paragraph" style:parent-style-name="Preformatted_20_Text">
      <style:paragraph-properties fo:text-align="start" style:justify-single-word="false"/>
      <style:text-properties officeooo:rsid="0021faf8" officeooo:paragraph-rsid="0021faf8"/>
    </style:style>
    <style:style style:name="P3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c953d" style:font-size-asian="10.5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3fd74c" style:font-size-asian="10.5pt" style:font-weight-asian="normal" style:font-size-complex="12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4c0dae" style:font-size-asian="10.5pt" style:font-weight-asian="normal" style:font-size-complex="12pt" style:font-weight-complex="normal"/>
    </style:style>
    <style:style style:name="T1" style:family="text">
      <style:text-properties officeooo:rsid="0009ee97"/>
    </style:style>
    <style:style style:name="T2" style:family="text">
      <style:text-properties officeooo:rsid="0012f2f0"/>
    </style:style>
    <style:style style:name="T3" style:family="text">
      <style:text-properties fo:color="#000000" loext:opacity="100%" fo:font-size="12pt" fo:font-weight="normal" officeooo:rsid="00170580" style:font-size-asian="10.5pt" style:font-weight-asian="normal" style:font-size-complex="12pt" style:font-weight-complex="normal"/>
    </style:style>
    <style:style style:name="T4" style:family="text">
      <style:text-properties fo:color="#000000" loext:opacity="100%" fo:font-size="12pt" fo:font-weight="normal" officeooo:rsid="00164b04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size="12pt" fo:font-weight="normal" officeooo:rsid="002c8d43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3a2655" style:font-size-asian="10.5pt" style:font-weight-asian="normal" style:font-size-complex="12pt" style:font-weight-complex="normal"/>
    </style:style>
    <style:style style:name="T7" style:family="text">
      <style:text-properties fo:color="#000000" loext:opacity="100%" fo:font-size="12pt" fo:font-weight="normal" officeooo:rsid="003ae10a" style:font-size-asian="10.5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3c7708" style:font-size-asian="10.5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3d8a50" style:font-size-asian="10.5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3fc0e5" style:font-size-asian="10.5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170580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1da7e0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21839c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bold" officeooo:rsid="002c97ac" style:font-size-asian="10.5pt" style:font-weight-asian="bold" style:font-size-complex="12pt" style:font-weight-complex="bold"/>
    </style:style>
    <style:style style:name="T16" style:family="text">
      <style:text-properties fo:color="#000000" loext:opacity="100%" fo:font-size="12pt" fo:font-weight="bold" officeooo:rsid="00170580" style:font-size-asian="12pt" style:font-weight-asian="bold" style:font-size-complex="12pt" style:font-weight-complex="bold"/>
    </style:style>
    <style:style style:name="T17" style:family="text">
      <style:text-properties fo:color="#000000" loext:opacity="100%" fo:font-weight="normal" officeooo:rsid="001aaa06" style:font-weight-asian="normal" style:font-weight-complex="normal"/>
    </style:style>
    <style:style style:name="T18" style:family="text">
      <style:text-properties fo:color="#000000" loext:opacity="100%" fo:font-weight="normal" officeooo:rsid="001da7e0" style:font-weight-asian="normal" style:font-weight-complex="normal"/>
    </style:style>
    <style:style style:name="T19" style:family="text">
      <style:text-properties officeooo:rsid="0018999d"/>
    </style:style>
    <style:style style:name="T20" style:family="text">
      <style:text-properties officeooo:rsid="0019b046"/>
    </style:style>
    <style:style style:name="T21" style:family="text">
      <style:text-properties officeooo:rsid="001aaa06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ff8ad" style:font-size-asian="12pt" style:font-size-complex="12pt"/>
    </style:style>
    <style:style style:name="T24" style:family="text">
      <style:text-properties fo:font-size="12pt" officeooo:rsid="0021839c" style:font-size-asian="12pt" style:font-size-complex="12pt"/>
    </style:style>
    <style:style style:name="T25" style:family="text">
      <style:text-properties fo:font-size="12pt" officeooo:rsid="0021faf8" style:font-size-asian="12pt" style:font-size-complex="12pt"/>
    </style:style>
    <style:style style:name="T26" style:family="text">
      <style:text-properties fo:font-size="12pt" officeooo:rsid="003d29b7" style:font-size-asian="12pt" style:font-size-complex="12pt"/>
    </style:style>
    <style:style style:name="T27" style:family="text">
      <style:text-properties fo:font-size="12pt" officeooo:rsid="003d8a50" style:font-size-asian="12pt" style:font-size-complex="12pt"/>
    </style:style>
    <style:style style:name="T28" style:family="text">
      <style:text-properties style:font-size-asian="12pt"/>
    </style:style>
    <style:style style:name="T29" style:family="text">
      <style:text-properties officeooo:rsid="001da7e0" style:font-size-asian="12pt"/>
    </style:style>
    <style:style style:name="T30" style:family="text">
      <style:text-properties officeooo:rsid="001e894f" style:font-size-asian="12pt"/>
    </style:style>
    <style:style style:name="T31" style:family="text">
      <style:text-properties officeooo:rsid="0028d61b" style:font-size-asian="12pt"/>
    </style:style>
    <style:style style:name="T32" style:family="text">
      <style:text-properties officeooo:rsid="002e3bbf" style:font-size-asian="12pt"/>
    </style:style>
    <style:style style:name="T33" style:family="text">
      <style:text-properties officeooo:rsid="002ff3be" style:font-size-asian="12pt"/>
    </style:style>
    <style:style style:name="T34" style:family="text">
      <style:text-properties officeooo:rsid="003d29b7" style:font-size-asian="12pt"/>
    </style:style>
    <style:style style:name="T35" style:family="text">
      <style:text-properties officeooo:rsid="003d8a50" style:font-size-asian="12pt"/>
    </style:style>
    <style:style style:name="T36" style:family="text">
      <style:text-properties officeooo:rsid="001dc92f"/>
    </style:style>
    <style:style style:name="T37" style:family="text">
      <style:text-properties officeooo:rsid="00235b23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4c714" style:font-weight-asian="bold" style:font-weight-complex="bold"/>
    </style:style>
    <style:style style:name="T40" style:family="text">
      <style:text-properties fo:font-weight="bold" officeooo:rsid="00265e9a" style:font-weight-asian="bold" style:font-weight-complex="bold"/>
    </style:style>
    <style:style style:name="T41" style:family="text">
      <style:text-properties fo:font-weight="bold" officeooo:rsid="002b352c" style:font-weight-asian="bold" style:font-weight-complex="bold"/>
    </style:style>
    <style:style style:name="T42" style:family="text">
      <style:text-properties fo:font-weight="bold" officeooo:rsid="003fd74c" style:font-weight-asian="bold" style:font-weight-complex="bold"/>
    </style:style>
    <style:style style:name="T43" style:family="text">
      <style:text-properties fo:font-weight="bold" officeooo:rsid="00112bdf" style:font-weight-asian="bold" style:font-weight-complex="bold"/>
    </style:style>
    <style:style style:name="T44" style:family="text">
      <style:text-properties fo:font-weight="bold" officeooo:rsid="004aa7b0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3f4cc7" style:font-weight-asian="normal" style:font-weight-complex="normal"/>
    </style:style>
    <style:style style:name="T47" style:family="text">
      <style:text-properties officeooo:rsid="00254d8e"/>
    </style:style>
    <style:style style:name="T48" style:family="text">
      <style:text-properties officeooo:rsid="00265e9a"/>
    </style:style>
    <style:style style:name="T49" style:family="text">
      <style:text-properties fo:color="#5b277d" loext:opacity="100%" fo:font-size="12pt" fo:font-weight="normal" officeooo:rsid="0021faf8" style:font-size-asian="12pt" style:font-weight-asian="normal" style:font-size-complex="12pt" style:font-weight-complex="normal"/>
    </style:style>
    <style:style style:name="T50" style:family="text">
      <style:text-properties officeooo:rsid="002ff3be"/>
    </style:style>
    <style:style style:name="T51" style:family="text">
      <style:text-properties officeooo:rsid="00338134"/>
    </style:style>
    <style:style style:name="T52" style:family="text">
      <style:text-properties officeooo:rsid="0035304e"/>
    </style:style>
    <style:style style:name="T53" style:family="text">
      <style:text-properties officeooo:rsid="00361d90"/>
    </style:style>
    <style:style style:name="T54" style:family="text">
      <style:text-properties officeooo:rsid="003f4cc7"/>
    </style:style>
    <style:style style:name="T55" style:family="text">
      <style:text-properties officeooo:rsid="0044c954"/>
    </style:style>
    <style:style style:name="T56" style:family="text">
      <style:text-properties officeooo:rsid="004c0dae"/>
    </style:style>
    <style:style style:name="T57" style:family="text">
      <style:text-properties officeooo:rsid="003a2655"/>
    </style:style>
    <style:style style:name="T58" style:family="text">
      <style:text-properties officeooo:rsid="004d67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_ML</text:p>
      <text:p text:style-name="P1"/>
      <text:p text:style-name="P1"/>
      <text:p text:style-name="P6"><text:tab/><text:tab/><text:tab/><text:span text:style-name="T41">Introduzione</text:span></text:p>
      <text:p text:style-name="P6"/>
      <text:p text:style-name="P6"><text:span text:style-name="T43">Informazioni sul </text:span><text:span text:style-name="T38">Dataset</text:span>:</text:p>
      <text:p text:style-name="P6">il dataset Iris offre 150 sample da 4 features float e una label che può assumere 3 classi di valori: Iris-setosa, Iris-versicolor e Iris-virginica.</text:p>
      <text:p text:style-name="P6">Il dataset è gia omogeneo in quanto offre 50 campioni per ogni classe e questo semplifica molto il lavoro.</text:p>
      <text:p text:style-name="P2"/>
      <text:p text:style-name="P2"/>
      <text:p text:style-name="P2">Il grande problema di questo dataset è che contiene pochi sample <text:span text:style-name="T1">(150)</text:span>, per questo motivo ho deciso di tenere solo il <text:span text:style-name="T1">10% (15)</text:span> <text:span text:style-name="T1">dei </text:span>campioni dei dati come testing set per il modello finale.</text:p>
      <text:p text:style-name="P2"/>
      <text:p text:style-name="P2">Sul training set ho deciso di <text:span text:style-name="T2">adottare la k-fold con k=</text:span><text:span text:style-name="T19">7</text:span><text:span text:style-name="T2"> per suddividere il dataset di training durante l’ottimizzazione degli iperparametri e la scelta del modello</text:span></text:p>
      <text:p text:style-name="P4"/>
      <text:p text:style-name="P4"/>
      <text:p text:style-name="P24"><text:tab/><text:tab/><text:span text:style-name="T51">Scelte dei modelli da testare</text:span></text:p>
      <text:p text:style-name="P24"/>
      <text:p text:style-name="P17">Trattandosi di un task di classificazione <text:span text:style-name="T52">multiclasse </text:span><text:span text:style-name="T53">sicuramente vorrei testare i modelli DecisionTreeClassifier() e KneighborsClassifier(); oltre a questi vorrei testare un modello 1-vs-all.</text:span></text:p>
      <text:p text:style-name="P17"/>
      <text:p text:style-name="P18"><text:span text:style-name="T53">DecisionTreeClassifier </text:span>e <text:span text:style-name="T53">KneighborsClassifier </text:span>verranno ottimizzate singolarmente in quanto gia supportano il multiclass; per quanto riguarda il metodo 1-vs-all non voglio usare la soluzione di sklearn OneVsRestClassifier() perché mi vincola ad usare l<text:span text:style-name="T55">a stessa tipologia di</text:span> modello per tutte le calssi.</text:p>
      <text:p text:style-name="P18"/>
      <text:p text:style-name="P33"><text:span text:style-name="T6">Tra le informazioni del dataset </text:span><text:span text:style-name="T9">(Iris.names)</text:span><text:span text:style-name="T6"> </text:span><text:span text:style-name="T7">ho appreso che una delle 3 classi è liearmente separabile </text:span><text:span text:style-name="T9">dalle altre </text:span><text:span text:style-name="T8">quindi tra i modelli da </text:span><text:span text:style-name="T9">scegliere</text:span><text:span text:style-name="T8"> per ogni classe userò un</text:span><text:span text:style-name="T10"> </text:span><text:span text:style-name="Source_20_Text"><text:span text:style-name="T22">LogisticRegression</text:span></text:span><text:span text:style-name="Source_20_Text"><text:span text:style-name="T26">() </text:span></text:span><text:span text:style-name="Source_20_Text"><text:span text:style-name="T27">e un </text:span></text:span><text:span text:style-name="Source_20_Text"><text:span text:style-name="Strong_20_Emphasis"><text:span text:style-name="T45">SVC</text:span></text:span></text:span><text:span text:style-name="Source_20_Text"><text:span text:style-name="T46">()</text:span></text:span></text:p>
      <text:p text:style-name="P4"/>
      <text:p text:style-name="P4"><text:tab/><text:tab/><text:span text:style-name="T42">1-vs-all</text:span></text:p>
      <text:p text:style-name="P4"><text:span text:style-name="T42"/></text:p>
      <text:p text:style-name="P19">Per i metodi 1-vs-all testerò i due modelli <text:span text:style-name="Source_20_Text"><text:span text:style-name="T28">LogisticRegression</text:span></text:span><text:span text:style-name="Source_20_Text"><text:span text:style-name="T34">() </text:span></text:span><text:span text:style-name="Source_20_Text"><text:span text:style-name="T35">e </text:span></text:span><text:span text:style-name="Strong_20_Emphasis"><text:span text:style-name="T45">SVC</text:span></text:span><text:span text:style-name="Source_20_Text"><text:span text:style-name="T54">() </text:span></text:span><text:span text:style-name="Source_20_Text">per ogni classe scegliendo quello più performante.</text:span></text:p>
      <text:p text:style-name="P39"><text:span text:style-name="Source_20_Text"><text:span text:style-name="T56">La funzione di aggregazione che interpreterà i modelli (gia ottimizzati) deve essere fatta a mano visti i limiti di <text:s/></text:span></text:span><text:span text:style-name="Source_20_Text"><text:span text:style-name="T57">OneVsRestClassifier</text:span></text:span><text:span text:style-name="Source_20_Text"><text:span text:style-name="T56">()</text:span></text:span></text:p>
      <text:p text:style-name="P19"><text:span text:style-name="Source_20_Text"/></text:p>
      <text:p text:style-name="P19"><text:span text:style-name="Source_20_Text"><text:span text:style-name="T38">fun aggregazione 1-vs-all –</text:span></text:span><text:span text:style-name="Source_20_Text"> </text:span><text:span text:style-name="Source_20_Text"><text:span text:style-name="T58">Ottimizzati 3 modelli di classificazione binaria serve interpretare i loro punteggi di probabilità di appartenenza alla classe per restituire la classe </text:span></text:span><text:soft-page-break/><text:span text:style-name="Source_20_Text"><text:span text:style-name="T58">più probabile.</text:span></text:span><text:span text:style-name="Source_20_Text"> </text:span></text:p>
      <text:p text:style-name="P5"/>
      <text:p text:style-name="P4"><text:tab/><text:tab/></text:p>
      <text:p text:style-name="P4"/>
      <text:p text:style-name="P4"/>
      <text:p text:style-name="P4"/>
      <text:p text:style-name="P32"><text:span text:style-name="T4"><text:tab/><text:tab/></text:span><text:span text:style-name="T16">_valutatore_kfold</text:span><text:span text:style-name="T15">()</text:span></text:p>
      <text:p text:style-name="P31"><text:span text:style-name="T4"/></text:p>
      <text:p text:style-name="P31"><text:span text:style-name="T4">FONTE:<text:tab/></text:span><text:a xlink:type="simple" xlink:href="https://scikit-learn.org/stable/modules/generated/sklearn.model_selection.StratifiedKFold.html" text:style-name="Internet_20_link" text:visited-style-name="Visited_20_Internet_20_Link"><text:span text:style-name="T5">doc StratifiedKFold</text:span></text:a></text:p>
      <text:p text:style-name="P15"/>
      <text:p text:style-name="P31"><text:span text:style-name="T3">Inizialmente ho pensato di implementare le funzioni del cross validation a mano per rendere i passaggi espliciti e per questo ho deciso di definire </text:span><text:span text:style-name="T12">“_valutatore_kfold”.</text:span></text:p>
      <text:p text:style-name="P31"><text:span text:style-name="T12"/></text:p>
      <text:p text:style-name="P26"><text:span text:style-name="T12">“_valutatore_kfold” </text:span><text:span text:style-name="T11">si occupa di testare un modello gia definito (iperparametri gia fissati) in k-fold omogenei, restituendo la media dei valutatori.</text:span></text:p>
      <text:p text:style-name="P26"><text:span text:style-name="T11"/></text:p>
      <text:p text:style-name="P21">L’idea era quella di chiamare “_valutatore_kfold” all’interno di un ciclo che testasse per ogni modello le varie combinazioni di iperparametri.</text:p>
      <text:p text:style-name="P21"/>
      <text:p text:style-name="P22">Ad ogni fold il dataset veniva partizionato tramite S<text:span text:style-name="T50">tratifiedKFold() che, a differenza di Kfold(), divide il dataset in sottogruppi omogenei.</text:span></text:p>
      <text:p text:style-name="P14"/>
      <text:p text:style-name="P14"/>
      <text:p text:style-name="P16">In seguito ho deciso però di adottare le funzioni di libreria e tenere _valutatore_kfold come dimostrazione del funzionamento di <text:span text:style-name="T32">S</text:span><text:span text:style-name="T33">tratifiedKFold()</text:span></text:p>
      <text:p text:style-name="P23"/>
      <text:p text:style-name="P27"><text:span text:style-name="T17">L’ottimizzazione degli iperparametri è eseguita tramite la funzione </text:span><text:span text:style-name="T18">GridSearchCV</text:span><text:span text:style-name="T21">().</text:span></text:p>
      <text:p text:style-name="P28"><text:span text:style-name="T50">Questa funzione esegue l’intero processo di cross validation </text:span><text:span text:style-name="T36">variando gli iperparametri e provando tutte le combinazioni fornite.</text:span></text:p>
      <text:p text:style-name="P3"><text:tab/></text:p>
      <text:p text:style-name="P3"><text:tab/><text:tab/><text:span text:style-name="T39">Configurazione di GridSearchCV()</text:span></text:p>
      <text:p text:style-name="P3"/>
      <text:p text:style-name="P9">FONDE:<text:tab/><text:a xlink:type="simple" xlink:href="https://scikit-learn.org/stable/modules/generated/sklearn.model_selection.GridSearchCV.html" text:style-name="Internet_20_link" text:visited-style-name="Visited_20_Internet_20_Link"><text:span text:style-name="T29">doc GridSearchCV</text:span></text:a></text:p>
      <text:p text:style-name="P30"><text:span text:style-name="T13">F</text:span><text:span text:style-name="T14">ONDE:<text:tab/></text:span><text:a xlink:type="simple" xlink:href="https://scikit-learn.org/stable/modules/compose.html#combining-estimators" text:style-name="Internet_20_link" text:visited-style-name="Visited_20_Internet_20_Link"><text:span text:style-name="T49">doc Pipeline</text:span></text:a></text:p>
      <text:p text:style-name="P9"><text:span text:style-name="T29"/></text:p>
      <text:p text:style-name="P29"><text:span text:style-name="T13"/></text:p>
      <text:p text:style-name="P9"><text:span text:style-name="T29"/></text:p>
      <text:p text:style-name="P34"><text:span text:style-name="T22">La voce estimator di GridSearchCV ci permette di </text:span><text:span text:style-name="T23">specificare quale modello utilizzare nell’ottimizzazione, in particolare estimator deve essere una funzione che implementi il metodo .fit() per accettare i dati ti training e il metodo .predict() per </text:span><text:span text:style-name="T24">poter </text:span><text:span text:style-name="T25">confrontare il modello con i dati di testing/validator.</text:span></text:p>
      <text:p text:style-name="P35"><text:span text:style-name="T22"/></text:p>
      <text:p text:style-name="P10">La voce cv di <text:span text:style-name="T30">GridSearchCV </text:span><text:span text:style-name="T28">ci permette di specificare la procedura di testing del modello (non le metriche da usare che invece sono scelte in scoring); in particolare ho deciso di usare la funzione </text:span><text:soft-page-break/><text:span text:style-name="T20">StratifierKFold() </text:span>per ottenere fold omogenei.</text:p>
      <text:p text:style-name="P10"/>
      <text:p text:style-name="P10">In fine per i modelli che necessitano di scalamento voglio che ad ogni fold i dati di training e validator vengano scalati basandosi sui soli dati di training; per fare questo fornisco all’estimator di GridSearchCV una pipeline.</text:p>
      <text:p text:style-name="P10"/>
      <text:p text:style-name="P10"><text:span text:style-name="T40">Pipeline </text:span><text:span text:style-name="T44">di Sklearn</text:span><text:span text:style-name="T48"> - </text:span>L’oggetto Pipeline di sklearn ci permette di concatenare più <text:span text:style-name="T37">oggetti</text:span> <text:span text:style-name="T37">sklearn che verranno eseguite in successione ad ogni fold.</text:span></text:p>
      <text:p text:style-name="P10"/>
      <text:p text:style-name="P11">Nello specifico si definisce una lista di oggetti <text:span text:style-name="T47">i quali devono avere i metodi .fit() e .transform(); l’ultimo oggetto può avere .predict() (cioè deve essere un "estimatore", come un classificatore o un regressore).</text:span></text:p>
      <text:p text:style-name="P11"/>
      <text:p text:style-name="P13">Nel nostro caso, per i modelli che ne hanno bisogno, passiamo a <text:s/><text:span text:style-name="T29">GridSearchCV</text:span><text:span text:style-name="T28">() una pipeline contenente uno scaler in modo da scalare i dati per ogni fold ed evitare che </text:span><text:span text:style-name="T31">la dimenzione delle features infuenzi la loro importanza a training time.</text:span></text:p>
      <text:p text:style-name="P11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. Inizio leggendo il file csv e suddividendo il dataset in Training e Testing senza normalizzare i valori. In seguito nella cross validation useremo la k-fold per suddividere il Training set in più fold con i Validato.</text:p>
      <text:p text:style-name="P7"/>
      <text:p text:style-name="P7"/>
      <text:p text:style-name="P3"><text:soft-page-break/></text:p>
      <text:p text:style-name="P3"/>
      <text:p text:style-name="P2"/>
      <text:p text:style-name="P2"/>
      <text:p text:style-name="P2"/>
      <text:p text:style-name="P2"/>
      <text:p text:style-name="P20"><text:span text:style-name="T5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0T19:04:29.548326255</dc:date>
    <meta:editing-duration>PT9H29M41S</meta:editing-duration>
    <meta:editing-cycles>70</meta:editing-cycles>
    <meta:generator>LibreOffice/24.2.7.2$Linux_X86_64 LibreOffice_project/420$Build-2</meta:generator>
    <meta:document-statistic meta:table-count="0" meta:image-count="0" meta:object-count="0" meta:page-count="4" meta:paragraph-count="36" meta:word-count="673" meta:character-count="4547" meta:non-whitespace-character-count="3890"/>
  </office:meta>
</office:document-meta>
</file>