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rsid="00095b91" officeooo:paragraph-rsid="00095b91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5b91" officeooo:paragraph-rsid="00095b91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fb091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c953d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3fd74c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140088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235b23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c7a22" officeooo:paragraph-rsid="001da7e0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1faf8" officeooo:paragraph-rsid="0021faf8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35b23" officeooo:paragraph-rsid="00235b23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716a0" officeooo:paragraph-rsid="002716a0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974b5" officeooo:paragraph-rsid="000fb091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64b04" officeooo:paragraph-rsid="002c8d43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4776a" officeooo:paragraph-rsid="0034776a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a2655" officeooo:paragraph-rsid="003a2655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3fd74c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4c0dae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3ef4" officeooo:paragraph-rsid="002c8d43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e3bbf" officeooo:paragraph-rsid="002e3bbf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c953d" style:font-size-asian="10.5pt" style:font-weight-asian="bold" style:font-size-complex="12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fb091" style:font-size-asian="10.5pt" style:font-weight-asian="bold" style:font-size-complex="12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524397" style:font-size-asian="10.5pt" style:font-weight-asian="bold" style:font-size-complex="12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5e3d34" officeooo:paragraph-rsid="005e3d34" style:font-size-asian="10.5pt" style:font-weight-asian="bold" style:font-size-complex="12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602614" officeooo:paragraph-rsid="0066bc68" style:font-size-asian="10.5pt" style:font-weight-asian="bold" style:font-size-complex="12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officeooo:rsid="00173ef4" officeooo:paragraph-rsid="002c8d43"/>
    </style:style>
    <style:style style:name="P29" style:family="paragraph" style:parent-style-name="Preformatted_20_Text">
      <style:paragraph-properties fo:text-align="start" style:justify-single-word="false"/>
      <style:text-properties fo:font-size="12pt" officeooo:paragraph-rsid="00315fc1" style:font-size-asian="12pt" style:font-size-complex="12pt"/>
    </style:style>
    <style:style style:name="P30" style:family="paragraph" style:parent-style-name="Preformatted_20_Text">
      <style:paragraph-properties fo:text-align="start" style:justify-single-word="false"/>
      <style:text-properties fo:font-size="12pt" officeooo:rsid="001aaa06" officeooo:paragraph-rsid="00315fc1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fo:font-size="12pt" fo:font-weight="normal" officeooo:rsid="004e97ad" officeooo:paragraph-rsid="004e97ad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size="12pt" fo:font-weight="normal" officeooo:rsid="0051a6f0" officeooo:paragraph-rsid="0051a6f0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ize="12pt" fo:font-weight="normal" officeooo:rsid="00524397" officeooo:paragraph-rsid="00524397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size="12pt" fo:font-weight="normal" officeooo:rsid="005815a5" officeooo:paragraph-rsid="005815a5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12pt" fo:font-weight="normal" officeooo:rsid="00741ceb" officeooo:paragraph-rsid="00724c45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ize="12pt" fo:font-weight="normal" officeooo:rsid="00742848" officeooo:paragraph-rsid="00742848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ize="12pt" fo:font-weight="bold" officeooo:rsid="0069655e" officeooo:paragraph-rsid="0069655e" style:font-size-asian="10.5pt" style:font-weight-asian="bold" style:font-size-complex="12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size="12pt" fo:font-weight="bold" officeooo:rsid="006b5422" officeooo:paragraph-rsid="006b5422" style:font-size-asian="10.5pt" style:font-weight-asian="bold" style:font-size-complex="12pt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size="12pt" fo:font-weight="bold" officeooo:rsid="006b5422" officeooo:paragraph-rsid="006d5003" style:font-size-asian="10.5pt" style:font-weight-asian="bold" style:font-size-complex="12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font-size="12pt" fo:font-weight="bold" officeooo:rsid="00724c45" officeooo:paragraph-rsid="00724c45" style:font-size-asian="12pt" style:font-weight-asian="bold" style:font-size-complex="12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fo:font-size="12pt" fo:font-weight="bold" officeooo:rsid="00742848" officeooo:paragraph-rsid="00966674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officeooo:paragraph-rsid="001da7e0"/>
    </style:style>
    <style:style style:name="P43" style:family="paragraph" style:parent-style-name="Preformatted_20_Text">
      <style:paragraph-properties fo:text-align="start" style:justify-single-word="false"/>
      <style:text-properties officeooo:paragraph-rsid="0021839c"/>
    </style:style>
    <style:style style:name="P44" style:family="paragraph" style:parent-style-name="Preformatted_20_Text">
      <style:paragraph-properties fo:text-align="start" style:justify-single-word="false"/>
      <style:text-properties officeooo:paragraph-rsid="002c8d43"/>
    </style:style>
    <style:style style:name="P45" style:family="paragraph" style:parent-style-name="Preformatted_20_Text">
      <style:paragraph-properties fo:text-align="start" style:justify-single-word="false"/>
      <style:text-properties officeooo:paragraph-rsid="002e3bbf"/>
    </style:style>
    <style:style style:name="P46" style:family="paragraph" style:parent-style-name="Preformatted_20_Text">
      <style:paragraph-properties fo:text-align="start" style:justify-single-word="false"/>
      <style:text-properties officeooo:paragraph-rsid="003c7708"/>
    </style:style>
    <style:style style:name="P47" style:family="paragraph" style:parent-style-name="Preformatted_20_Text">
      <style:paragraph-properties fo:text-align="start" style:justify-single-word="false"/>
      <style:text-properties officeooo:paragraph-rsid="004e97ad"/>
    </style:style>
    <style:style style:name="P48" style:family="paragraph" style:parent-style-name="Preformatted_20_Text">
      <style:paragraph-properties fo:text-align="start" style:justify-single-word="false"/>
      <style:text-properties officeooo:rsid="001e894f" officeooo:paragraph-rsid="001e894f"/>
    </style:style>
    <style:style style:name="P49" style:family="paragraph" style:parent-style-name="Preformatted_20_Text">
      <style:paragraph-properties fo:text-align="start" style:justify-single-word="false"/>
      <style:text-properties officeooo:rsid="0021faf8" officeooo:paragraph-rsid="0021faf8"/>
    </style:style>
    <style:style style:name="P50" style:family="paragraph" style:parent-style-name="Text_20_body">
      <style:text-properties officeooo:paragraph-rsid="007bcd2f"/>
    </style:style>
    <style:style style:name="P51" style:family="paragraph" style:parent-style-name="Text_20_body">
      <style:text-properties officeooo:paragraph-rsid="007d2e29"/>
    </style:style>
    <style:style style:name="P52" style:family="paragraph" style:parent-style-name="Text_20_body">
      <style:text-properties officeooo:paragraph-rsid="007da330"/>
    </style:style>
    <style:style style:name="P53" style:family="paragraph" style:parent-style-name="Text_20_body">
      <style:text-properties style:font-name="Liberation Mono" fo:font-weight="bold" officeooo:rsid="008115fb" officeooo:paragraph-rsid="008115fb" style:font-weight-asian="bold" style:font-weight-complex="bold"/>
    </style:style>
    <style:style style:name="P54" style:family="paragraph" style:parent-style-name="Text_20_body">
      <style:text-properties style:font-name="Liberation Mono" fo:font-weight="bold" officeooo:rsid="0088a766" officeooo:paragraph-rsid="0088a766" style:font-weight-asian="bold" style:font-weight-complex="bold"/>
    </style:style>
    <style:style style:name="P55" style:family="paragraph" style:parent-style-name="Text_20_body">
      <style:text-properties style:font-name="Liberation Mono" fo:font-weight="bold" officeooo:rsid="0082b2ac" officeooo:paragraph-rsid="0082b2ac" style:font-weight-asian="bold" style:font-weight-complex="bold"/>
    </style:style>
    <style:style style:name="P56" style:family="paragraph" style:parent-style-name="Text_20_body">
      <style:text-properties style:font-name="Liberation Mono" fo:font-weight="bold" officeooo:rsid="008fab6a" officeooo:paragraph-rsid="008fab6a" style:font-weight-asian="bold" style:font-weight-complex="bold"/>
    </style:style>
    <style:style style:name="P57" style:family="paragraph" style:parent-style-name="Text_20_body">
      <style:text-properties style:font-name="Liberation Mono" fo:font-weight="bold" officeooo:rsid="00927849" officeooo:paragraph-rsid="00927849" style:font-weight-asian="bold" style:font-weight-complex="bold"/>
    </style:style>
    <style:style style:name="P58" style:family="paragraph" style:parent-style-name="Text_20_body">
      <style:text-properties style:font-name="Liberation Mono" fo:font-weight="bold" officeooo:rsid="0092f470" officeooo:paragraph-rsid="0092f470" style:font-weight-asian="bold" style:font-weight-complex="bold"/>
    </style:style>
    <style:style style:name="P59" style:family="paragraph" style:parent-style-name="Text_20_body">
      <style:text-properties style:font-name="Liberation Mono" fo:font-weight="normal" officeooo:rsid="0094f559" officeooo:paragraph-rsid="0094f559" style:font-weight-asian="normal" style:font-weight-complex="normal"/>
    </style:style>
    <style:style style:name="P60" style:family="paragraph" style:parent-style-name="Text_20_body">
      <style:text-properties style:font-name="Liberation Mono" fo:font-weight="bold" officeooo:rsid="0088a766" officeooo:paragraph-rsid="0088a766" style:font-weight-asian="bold" style:font-weight-complex="bold"/>
    </style:style>
    <style:style style:name="P61" style:family="paragraph" style:parent-style-name="Preformatted_20_Text">
      <style:paragraph-properties fo:text-align="start" style:justify-single-word="false"/>
      <style:text-properties fo:font-size="12pt" fo:font-weight="bold" officeooo:rsid="00742848" officeooo:paragraph-rsid="00966674" style:font-size-asian="12pt" style:font-weight-asian="bold" style:font-size-complex="12pt" style:font-weight-complex="bold"/>
    </style:style>
    <style:style style:name="P62" style:family="paragraph" style:parent-style-name="Preformatted_20_Text">
      <style:paragraph-properties fo:text-align="start" style:justify-single-word="false"/>
      <style:text-properties fo:font-size="12pt" fo:font-weight="bold" officeooo:rsid="009d575a" officeooo:paragraph-rsid="009d575a" style:font-size-asian="12pt" style:font-weight-asian="bold" style:font-size-complex="12pt" style:font-weight-complex="bold"/>
    </style:style>
    <style:style style:name="T1" style:family="text">
      <style:text-properties officeooo:rsid="0009ee97"/>
    </style:style>
    <style:style style:name="T2" style:family="text">
      <style:text-properties officeooo:rsid="0012f2f0"/>
    </style:style>
    <style:style style:name="T3" style:family="text">
      <style:text-properties fo:color="#000000" loext:opacity="100%" fo:font-size="12pt" fo:font-weight="normal" officeooo:rsid="00170580" style:font-size-asian="10.5pt" style:font-weight-asian="normal" style:font-size-complex="12pt" style:font-weight-complex="normal"/>
    </style:style>
    <style:style style:name="T4" style:family="text">
      <style:text-properties fo:color="#000000" loext:opacity="100%" fo:font-size="12pt" fo:font-weight="normal" officeooo:rsid="00164b04" style:font-size-asian="10.5pt" style:font-weight-asian="normal" style:font-size-complex="12pt" style:font-weight-complex="normal"/>
    </style:style>
    <style:style style:name="T5" style:family="text">
      <style:text-properties fo:color="#000000" loext:opacity="100%" fo:font-size="12pt" fo:font-weight="normal" officeooo:rsid="002c8d43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3a2655" style:font-size-asian="10.5pt" style:font-weight-asian="normal" style:font-size-complex="12pt" style:font-weight-complex="normal"/>
    </style:style>
    <style:style style:name="T7" style:family="text">
      <style:text-properties fo:color="#000000" loext:opacity="100%" fo:font-size="12pt" fo:font-weight="normal" officeooo:rsid="003ae10a" style:font-size-asian="10.5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3c7708" style:font-size-asian="10.5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3d8a50" style:font-size-asian="10.5pt" style:font-weight-asian="normal" style:font-size-complex="12pt" style:font-weight-complex="normal"/>
    </style:style>
    <style:style style:name="T10" style:family="text">
      <style:text-properties fo:color="#000000" loext:opacity="100%" fo:font-size="12pt" fo:font-weight="normal" officeooo:rsid="003fc0e5" style:font-size-asian="10.5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4e97ad" style:font-size-asian="10.5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170580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1da7e0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21839c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bold" officeooo:rsid="002c97ac" style:font-size-asian="10.5pt" style:font-weight-asian="bold" style:font-size-complex="12pt" style:font-weight-complex="bold"/>
    </style:style>
    <style:style style:name="T17" style:family="text">
      <style:text-properties fo:color="#000000" loext:opacity="100%" fo:font-size="12pt" fo:font-weight="bold" officeooo:rsid="00170580" style:font-size-asian="12pt" style:font-weight-asian="bold" style:font-size-complex="12pt" style:font-weight-complex="bold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weight="normal" officeooo:rsid="001aaa06" style:font-weight-asian="normal" style:font-weight-complex="normal"/>
    </style:style>
    <style:style style:name="T20" style:family="text">
      <style:text-properties fo:color="#000000" loext:opacity="100%" fo:font-weight="normal" officeooo:rsid="001da7e0" style:font-weight-asian="normal" style:font-weight-complex="normal"/>
    </style:style>
    <style:style style:name="T21" style:family="text">
      <style:text-properties fo:color="#000000" loext:opacity="100%" fo:font-weight="normal" officeooo:rsid="006ab6ad" style:font-weight-asian="normal" style:font-weight-complex="normal"/>
    </style:style>
    <style:style style:name="T22" style:family="text">
      <style:text-properties officeooo:rsid="0018999d"/>
    </style:style>
    <style:style style:name="T23" style:family="text">
      <style:text-properties officeooo:rsid="0019b046"/>
    </style:style>
    <style:style style:name="T24" style:family="text">
      <style:text-properties officeooo:rsid="001aaa06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1ff8ad" style:font-size-asian="12pt" style:font-size-complex="12pt"/>
    </style:style>
    <style:style style:name="T27" style:family="text">
      <style:text-properties fo:font-size="12pt" officeooo:rsid="0021839c" style:font-size-asian="12pt" style:font-size-complex="12pt"/>
    </style:style>
    <style:style style:name="T28" style:family="text">
      <style:text-properties fo:font-size="12pt" officeooo:rsid="0021faf8" style:font-size-asian="12pt" style:font-size-complex="12pt"/>
    </style:style>
    <style:style style:name="T29" style:family="text">
      <style:text-properties fo:font-size="12pt" officeooo:rsid="003d29b7" style:font-size-asian="12pt" style:font-size-complex="12pt"/>
    </style:style>
    <style:style style:name="T30" style:family="text">
      <style:text-properties fo:font-size="12pt" officeooo:rsid="003d8a50" style:font-size-asian="12pt" style:font-size-complex="12pt"/>
    </style:style>
    <style:style style:name="T31" style:family="text">
      <style:text-properties fo:font-size="12pt" officeooo:rsid="004e97ad" style:font-size-asian="12pt" style:font-size-complex="12pt"/>
    </style:style>
    <style:style style:name="T32" style:family="text">
      <style:text-properties fo:font-size="12pt" officeooo:rsid="0059db9a" style:font-size-asian="12pt" style:font-size-complex="12pt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7b1759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7b67b7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7bcd2f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7cbfad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7d2e29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7e95dd" style:font-size-asian="12pt" style:font-weight-asian="normal" style:font-size-complex="12pt" style:font-weight-complex="normal"/>
    </style:style>
    <style:style style:name="T40" style:family="text">
      <style:text-properties fo:font-size="12pt" fo:font-weight="bold" officeooo:rsid="007bcd2f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7cbfad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7d2e29" style:font-size-asian="12pt" style:font-weight-asian="bold" style:font-size-complex="12pt" style:font-weight-complex="bold"/>
    </style:style>
    <style:style style:name="T43" style:family="text">
      <style:text-properties style:font-size-asian="12pt"/>
    </style:style>
    <style:style style:name="T44" style:family="text">
      <style:text-properties officeooo:rsid="001da7e0" style:font-size-asian="12pt"/>
    </style:style>
    <style:style style:name="T45" style:family="text">
      <style:text-properties officeooo:rsid="001e894f" style:font-size-asian="12pt"/>
    </style:style>
    <style:style style:name="T46" style:family="text">
      <style:text-properties officeooo:rsid="0028d61b" style:font-size-asian="12pt"/>
    </style:style>
    <style:style style:name="T47" style:family="text">
      <style:text-properties officeooo:rsid="002e3bbf" style:font-size-asian="12pt"/>
    </style:style>
    <style:style style:name="T48" style:family="text">
      <style:text-properties officeooo:rsid="002ff3be" style:font-size-asian="12pt"/>
    </style:style>
    <style:style style:name="T49" style:family="text">
      <style:text-properties officeooo:rsid="003d29b7" style:font-size-asian="12pt"/>
    </style:style>
    <style:style style:name="T50" style:family="text">
      <style:text-properties officeooo:rsid="003d8a50" style:font-size-asian="12pt"/>
    </style:style>
    <style:style style:name="T51" style:family="text">
      <style:text-properties officeooo:rsid="001dc92f"/>
    </style:style>
    <style:style style:name="T52" style:family="text">
      <style:text-properties officeooo:rsid="00235b23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24c714" style:font-weight-asian="bold" style:font-weight-complex="bold"/>
    </style:style>
    <style:style style:name="T55" style:family="text">
      <style:text-properties fo:font-weight="bold" officeooo:rsid="00265e9a" style:font-weight-asian="bold" style:font-weight-complex="bold"/>
    </style:style>
    <style:style style:name="T56" style:family="text">
      <style:text-properties fo:font-weight="bold" officeooo:rsid="002b352c" style:font-weight-asian="bold" style:font-weight-complex="bold"/>
    </style:style>
    <style:style style:name="T57" style:family="text">
      <style:text-properties fo:font-weight="bold" officeooo:rsid="003fd74c" style:font-weight-asian="bold" style:font-weight-complex="bold"/>
    </style:style>
    <style:style style:name="T58" style:family="text">
      <style:text-properties fo:font-weight="bold" officeooo:rsid="00112bdf" style:font-weight-asian="bold" style:font-weight-complex="bold"/>
    </style:style>
    <style:style style:name="T59" style:family="text">
      <style:text-properties fo:font-weight="bold" officeooo:rsid="004aa7b0" style:font-weight-asian="bold" style:font-weight-complex="bold"/>
    </style:style>
    <style:style style:name="T60" style:family="text">
      <style:text-properties fo:font-weight="bold" officeooo:rsid="00602614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3f4cc7" style:font-weight-asian="normal" style:font-weight-complex="normal"/>
    </style:style>
    <style:style style:name="T63" style:family="text">
      <style:text-properties fo:font-weight="normal" officeooo:rsid="0061d9c4" style:font-weight-asian="normal" style:font-weight-complex="normal"/>
    </style:style>
    <style:style style:name="T64" style:family="text">
      <style:text-properties fo:font-weight="normal" officeooo:rsid="006624eb" style:font-weight-asian="normal" style:font-weight-complex="normal"/>
    </style:style>
    <style:style style:name="T65" style:family="text">
      <style:text-properties fo:font-weight="normal" officeooo:rsid="00688ed3" style:font-weight-asian="normal" style:font-weight-complex="normal"/>
    </style:style>
    <style:style style:name="T66" style:family="text">
      <style:text-properties fo:font-weight="normal" officeooo:rsid="0069655e" style:font-weight-asian="normal" style:font-weight-complex="normal"/>
    </style:style>
    <style:style style:name="T67" style:family="text">
      <style:text-properties fo:font-weight="normal" officeooo:rsid="006b7c73" style:font-weight-asian="normal" style:font-weight-complex="normal"/>
    </style:style>
    <style:style style:name="T68" style:family="text">
      <style:text-properties fo:font-weight="normal" officeooo:rsid="0082d90b" style:font-weight-asian="normal" style:font-weight-complex="normal"/>
    </style:style>
    <style:style style:name="T69" style:family="text">
      <style:text-properties fo:font-weight="normal" officeooo:rsid="008355ff" style:font-weight-asian="normal" style:font-weight-complex="normal"/>
    </style:style>
    <style:style style:name="T70" style:family="text">
      <style:text-properties fo:font-weight="normal" officeooo:rsid="00853700" style:font-weight-asian="normal" style:font-weight-complex="normal"/>
    </style:style>
    <style:style style:name="T71" style:family="text">
      <style:text-properties fo:font-weight="normal" officeooo:rsid="0086b4fa" style:font-weight-asian="normal" style:font-weight-complex="normal"/>
    </style:style>
    <style:style style:name="T72" style:family="text">
      <style:text-properties fo:font-weight="normal" officeooo:rsid="0089f72e" style:font-weight-asian="normal" style:font-weight-complex="normal"/>
    </style:style>
    <style:style style:name="T73" style:family="text">
      <style:text-properties fo:font-weight="normal" officeooo:rsid="00911928" style:font-weight-asian="normal" style:font-weight-complex="normal"/>
    </style:style>
    <style:style style:name="T74" style:family="text">
      <style:text-properties fo:font-weight="normal" officeooo:rsid="0078151a" style:font-weight-asian="normal" style:font-weight-complex="normal"/>
    </style:style>
    <style:style style:name="T75" style:family="text">
      <style:text-properties fo:font-weight="normal" officeooo:rsid="00757273" style:font-weight-asian="normal" style:font-weight-complex="normal"/>
    </style:style>
    <style:style style:name="T76" style:family="text">
      <style:text-properties fo:font-weight="normal" officeooo:rsid="0076169d" style:font-weight-asian="normal" style:font-weight-complex="normal"/>
    </style:style>
    <style:style style:name="T77" style:family="text">
      <style:text-properties fo:font-weight="normal" officeooo:rsid="009c2b39" style:font-weight-asian="normal" style:font-weight-complex="normal"/>
    </style:style>
    <style:style style:name="T78" style:family="text">
      <style:text-properties fo:font-weight="normal" officeooo:rsid="009c4a5a" style:font-weight-asian="normal" style:font-weight-complex="normal"/>
    </style:style>
    <style:style style:name="T79" style:family="text">
      <style:text-properties fo:font-weight="normal" style:font-size-asian="12pt" style:font-weight-asian="normal" style:font-weight-complex="normal"/>
    </style:style>
    <style:style style:name="T80" style:family="text">
      <style:text-properties fo:font-weight="normal" officeooo:rsid="006ab6ad" style:font-size-asian="12pt" style:font-weight-asian="normal" style:font-weight-complex="normal"/>
    </style:style>
    <style:style style:name="T81" style:family="text">
      <style:text-properties fo:font-weight="normal" officeooo:rsid="006d5003" style:font-size-asian="12pt" style:font-weight-asian="normal" style:font-weight-complex="normal"/>
    </style:style>
    <style:style style:name="T82" style:family="text">
      <style:text-properties fo:font-weight="normal" officeooo:rsid="006e185c" style:font-size-asian="12pt" style:font-weight-asian="normal" style:font-weight-complex="normal"/>
    </style:style>
    <style:style style:name="T83" style:family="text">
      <style:text-properties fo:font-weight="normal" officeooo:rsid="009a5b85" style:font-size-asian="12pt" style:font-weight-asian="normal" style:font-weight-complex="normal"/>
    </style:style>
    <style:style style:name="T84" style:family="text">
      <style:text-properties fo:font-weight="normal" officeooo:rsid="009bc073" style:font-size-asian="12pt" style:font-weight-asian="normal" style:font-weight-complex="normal"/>
    </style:style>
    <style:style style:name="T85" style:family="text">
      <style:text-properties officeooo:rsid="00254d8e"/>
    </style:style>
    <style:style style:name="T86" style:family="text">
      <style:text-properties officeooo:rsid="00265e9a"/>
    </style:style>
    <style:style style:name="T87" style:family="text">
      <style:text-properties fo:color="#5b277d" loext:opacity="100%" fo:font-size="12pt" fo:font-weight="normal" officeooo:rsid="0021faf8" style:font-size-asian="12pt" style:font-weight-asian="normal" style:font-size-complex="12pt" style:font-weight-complex="normal"/>
    </style:style>
    <style:style style:name="T88" style:family="text">
      <style:text-properties officeooo:rsid="002ff3be"/>
    </style:style>
    <style:style style:name="T89" style:family="text">
      <style:text-properties officeooo:rsid="00338134"/>
    </style:style>
    <style:style style:name="T90" style:family="text">
      <style:text-properties officeooo:rsid="0035304e"/>
    </style:style>
    <style:style style:name="T91" style:family="text">
      <style:text-properties officeooo:rsid="00361d90"/>
    </style:style>
    <style:style style:name="T92" style:family="text">
      <style:text-properties officeooo:rsid="003f4cc7"/>
    </style:style>
    <style:style style:name="T93" style:family="text">
      <style:text-properties officeooo:rsid="0044c954"/>
    </style:style>
    <style:style style:name="T94" style:family="text">
      <style:text-properties officeooo:rsid="004c0dae"/>
    </style:style>
    <style:style style:name="T95" style:family="text">
      <style:text-properties officeooo:rsid="003a2655"/>
    </style:style>
    <style:style style:name="T96" style:family="text">
      <style:text-properties officeooo:rsid="004d671e"/>
    </style:style>
    <style:style style:name="T97" style:family="text">
      <style:text-properties officeooo:rsid="00522c29"/>
    </style:style>
    <style:style style:name="T98" style:family="text">
      <style:text-properties officeooo:rsid="0053a533"/>
    </style:style>
    <style:style style:name="T99" style:family="text">
      <style:text-properties officeooo:rsid="0056d06b"/>
    </style:style>
    <style:style style:name="T100" style:family="text">
      <style:text-properties officeooo:rsid="0057490e"/>
    </style:style>
    <style:style style:name="T101" style:family="text">
      <style:text-properties officeooo:rsid="0057be10"/>
    </style:style>
    <style:style style:name="T102" style:family="text">
      <style:text-properties officeooo:rsid="00585bd6"/>
    </style:style>
    <style:style style:name="T103" style:family="text">
      <style:text-properties officeooo:rsid="005aad9f"/>
    </style:style>
    <style:style style:name="T104" style:family="text">
      <style:text-properties officeooo:rsid="005b314a"/>
    </style:style>
    <style:style style:name="T105" style:family="text">
      <style:text-properties officeooo:rsid="005b3e16"/>
    </style:style>
    <style:style style:name="T106" style:family="text">
      <style:text-properties officeooo:rsid="0078151a"/>
    </style:style>
    <style:style style:name="T107" style:family="text">
      <style:text-properties officeooo:rsid="0086b4fa"/>
    </style:style>
    <style:style style:name="T108" style:family="text">
      <style:text-properties officeooo:rsid="0094e12e"/>
    </style:style>
    <style:style style:name="T109" style:family="text">
      <style:text-properties officeooo:rsid="00989e0e"/>
    </style:style>
    <style:style style:name="T110" style:family="text">
      <style:text-properties officeooo:rsid="009c2b39"/>
    </style:style>
    <style:style style:name="T111" style:family="text">
      <style:text-properties officeooo:rsid="009c4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_ML</text:p>
      <text:p text:style-name="P1"/>
      <text:p text:style-name="P1"/>
      <text:p text:style-name="P6"><text:tab/><text:tab/><text:tab/><text:span text:style-name="T56">Introduzione</text:span></text:p>
      <text:p text:style-name="P6"/>
      <text:p text:style-name="P6"><text:span text:style-name="T58">Informazioni sul </text:span><text:span text:style-name="T53">Dataset</text:span>:</text:p>
      <text:p text:style-name="P6">il dataset Iris offre 150 sample da 4 features float e una label che può assumere 3 classi di valori: Iris-setosa, Iris-versicolor e Iris-virginica.</text:p>
      <text:p text:style-name="P6">Il dataset è gia omogeneo in quanto offre 50 campioni per ogni classe e questo semplifica molto il lavoro.</text:p>
      <text:p text:style-name="P2"/>
      <text:p text:style-name="P2"/>
      <text:p text:style-name="P2">Il grande problema di questo dataset è che contiene pochi sample <text:span text:style-name="T1">(150)</text:span>, per questo motivo ho deciso di tenere solo il <text:span text:style-name="T1">10% (15)</text:span> <text:span text:style-name="T1">dei </text:span>campioni dei dati come testing set per il modello finale.</text:p>
      <text:p text:style-name="P2"/>
      <text:p text:style-name="P2">Sul training set ho deciso di <text:span text:style-name="T2">adottare la k-fold con k=</text:span><text:span text:style-name="T22">7</text:span><text:span text:style-name="T2"> per suddividere il dataset di training durante l’ottimizzazione degli iperparametri e la scelta del modello</text:span></text:p>
      <text:p text:style-name="P4"/>
      <text:p text:style-name="P4"/>
      <text:p text:style-name="P23"><text:tab/><text:tab/><text:span text:style-name="T89">Scelte dei modelli da testare</text:span></text:p>
      <text:p text:style-name="P23"/>
      <text:p text:style-name="P16">Trattandosi di un task di classificazione <text:span text:style-name="T90">multiclasse </text:span><text:span text:style-name="T91">sicuramente vorrei testare i modelli DecisionTreeClassifier() e KneighborsClassifier(); oltre a questi vorrei testare un modello 1-vs-all.</text:span></text:p>
      <text:p text:style-name="P16"/>
      <text:p text:style-name="P17"><text:span text:style-name="T91">DecisionTreeClassifier </text:span>e <text:span text:style-name="T91">KneighborsClassifier </text:span>verranno ottimizzate singolarmente in quanto gia supportano il multiclass; per quanto riguarda il metodo 1-vs-all non voglio usare la soluzione di sklearn OneVsRestClassifier() perché mi vincola ad usare l<text:span text:style-name="T93">a stessa tipologia di</text:span> modello per tutte le calssi.</text:p>
      <text:p text:style-name="P17"/>
      <text:p text:style-name="P46"><text:span text:style-name="T6">Tra le informazioni del dataset </text:span><text:span text:style-name="T9">(Iris.names)</text:span><text:span text:style-name="T6"> </text:span><text:span text:style-name="T7">ho appreso che una delle 3 classi è liearmente separabile </text:span><text:span text:style-name="T9">dalle altre </text:span><text:span text:style-name="T8">quindi tra i modelli da </text:span><text:span text:style-name="T9">scegliere</text:span><text:span text:style-name="T8"> per ogni classe userò un</text:span><text:span text:style-name="T10"> </text:span><text:span text:style-name="Source_20_Text"><text:span text:style-name="T25">LogisticRegression</text:span></text:span><text:span text:style-name="Source_20_Text"><text:span text:style-name="T29">() </text:span></text:span><text:span text:style-name="Source_20_Text"><text:span text:style-name="T30">e un </text:span></text:span><text:span text:style-name="Source_20_Text"><text:span text:style-name="Strong_20_Emphasis"><text:span text:style-name="T61">SVC</text:span></text:span></text:span><text:span text:style-name="Source_20_Text"><text:span text:style-name="T62">()</text:span></text:span></text:p>
      <text:p text:style-name="P4"/>
      <text:p text:style-name="P4"><text:tab/><text:tab/><text:span text:style-name="T57">1-vs-all</text:span></text:p>
      <text:p text:style-name="P4"><text:span text:style-name="T57"/></text:p>
      <text:p text:style-name="P18">Per i metodi 1-vs-all testerò i due modelli <text:span text:style-name="Source_20_Text"><text:span text:style-name="T43">LogisticRegression</text:span></text:span><text:span text:style-name="Source_20_Text"><text:span text:style-name="T49">() </text:span></text:span><text:span text:style-name="Source_20_Text"><text:span text:style-name="T50">e </text:span></text:span><text:span text:style-name="Strong_20_Emphasis"><text:span text:style-name="T61">SVC</text:span></text:span><text:span text:style-name="Source_20_Text"><text:span text:style-name="T92">() </text:span></text:span><text:span text:style-name="Source_20_Text">per ogni classe scegliendo quello più performante.</text:span></text:p>
      <text:p text:style-name="P19"><text:span text:style-name="Source_20_Text"><text:span text:style-name="T94">La funzione di aggregazione che interpreterà i modelli (gia ottimizzati) deve essere fatta a mano visti i limiti di <text:s/></text:span></text:span><text:span text:style-name="Source_20_Text"><text:span text:style-name="T95">OneVsRestClassifier</text:span></text:span><text:span text:style-name="Source_20_Text"><text:span text:style-name="T94">()</text:span></text:span></text:p>
      <text:p text:style-name="P18"><text:span text:style-name="Source_20_Text"/></text:p>
      <text:p text:style-name="P18"><text:span text:style-name="Source_20_Text"><text:span text:style-name="T53">fun aggregazione 1-vs-all –</text:span></text:span><text:span text:style-name="Source_20_Text"> </text:span><text:span text:style-name="Source_20_Text"><text:span text:style-name="T96">Ottimizzati 3 modelli di classificazione binaria serve interpretare i loro punteggi di probabilità di appartenenza alla classe per restituire la classe </text:span></text:span><text:soft-page-break/><text:span text:style-name="Source_20_Text"><text:span text:style-name="T96">più probabile.</text:span></text:span><text:span text:style-name="Source_20_Text"> </text:span></text:p>
      <text:p text:style-name="P5"/>
      <text:p text:style-name="P26">Softmax –<text:span text:style-name="T61"> Addestrati i tre modelli binari estrapolo in fase di testing le loro probabilità e le interpreto con una funzione softmax in modo da ottenere non solo la classe più probabile sencondo il modello ma anche il grado di sicurezza che ha.</text:span></text:p>
      <text:p text:style-name="P4"><text:tab/><text:tab/></text:p>
      <text:p text:style-name="P4"/>
      <text:p text:style-name="P4"/>
      <text:p text:style-name="P4"/>
      <text:p text:style-name="P45"><text:span text:style-name="T4"><text:tab/><text:tab/></text:span><text:span text:style-name="T17">_valutatore_kfold</text:span><text:span text:style-name="T16">()</text:span></text:p>
      <text:p text:style-name="P44"><text:span text:style-name="T4"/></text:p>
      <text:p text:style-name="P44"><text:span text:style-name="T4">FONTE:<text:tab/></text:span><text:a xlink:type="simple" xlink:href="https://scikit-learn.org/stable/modules/generated/sklearn.model_selection.StratifiedKFold.html" text:style-name="Internet_20_link" text:visited-style-name="Visited_20_Internet_20_Link"><text:span text:style-name="T5">doc StratifiedKFold</text:span></text:a></text:p>
      <text:p text:style-name="P14"/>
      <text:p text:style-name="P44"><text:span text:style-name="T3">Inizialmente ho pensato di implementare le funzioni del cross validation a mano per rendere i passaggi espliciti e per questo ho deciso di definire </text:span><text:span text:style-name="T13">“_valutatore_kfold”.</text:span></text:p>
      <text:p text:style-name="P44"><text:span text:style-name="T13"/></text:p>
      <text:p text:style-name="P28"><text:span text:style-name="T13">“_valutatore_kfold” </text:span><text:span text:style-name="T12">si occupa di testare un modello gia definito (iperparametri gia fissati) in k-fold omogenei, restituendo la media dei valutatori.</text:span></text:p>
      <text:p text:style-name="P28"><text:span text:style-name="T12"/></text:p>
      <text:p text:style-name="P20">L’idea era quella di chiamare “_valutatore_kfold” all’interno di un ciclo che testasse per ogni modello le varie combinazioni di iperparametri.</text:p>
      <text:p text:style-name="P20"/>
      <text:p text:style-name="P21">Ad ogni fold il dataset veniva partizionato tramite S<text:span text:style-name="T88">tratifiedKFold() che, a differenza di Kfold(), divide il dataset in sottogruppi omogenei.</text:span></text:p>
      <text:p text:style-name="P13"/>
      <text:p text:style-name="P13"/>
      <text:p text:style-name="P15">In seguito ho deciso però di adottare le funzioni di libreria e tenere _valutatore_kfold come dimostrazione del funzionamento di <text:span text:style-name="T47">S</text:span><text:span text:style-name="T48">tratifiedKFold()</text:span></text:p>
      <text:p text:style-name="P22"/>
      <text:p text:style-name="P29"><text:span text:style-name="T19">L’ottimizzazione degli iperparametri è eseguita tramite la funzione </text:span><text:span text:style-name="T20">GridSearchCV</text:span><text:span text:style-name="T24">().</text:span></text:p>
      <text:p text:style-name="P30"><text:span text:style-name="T88">Questa funzione esegue l’intero processo di cross validation </text:span><text:span text:style-name="T51">variando gli iperparametri e provando tutte le combinazioni fornite.</text:span></text:p>
      <text:p text:style-name="P3"><text:tab/></text:p>
      <text:p text:style-name="P3"><text:tab/><text:tab/><text:span text:style-name="T54">Configurazione di GridSearchCV()</text:span></text:p>
      <text:p text:style-name="P3"/>
      <text:p text:style-name="P9">FONDE:<text:tab/><text:a xlink:type="simple" xlink:href="https://scikit-learn.org/stable/modules/generated/sklearn.model_selection.GridSearchCV.html" text:style-name="Internet_20_link" text:visited-style-name="Visited_20_Internet_20_Link"><text:span text:style-name="T44">doc GridSearchCV</text:span></text:a></text:p>
      <text:p text:style-name="P43"><text:span text:style-name="T14">F</text:span><text:span text:style-name="T15">ONDE:<text:tab/></text:span><text:a xlink:type="simple" xlink:href="https://scikit-learn.org/stable/modules/compose.html#combining-estimators" text:style-name="Internet_20_link" text:visited-style-name="Visited_20_Internet_20_Link"><text:span text:style-name="T87">doc Pipeline</text:span></text:a></text:p>
      <text:p text:style-name="P9"><text:span text:style-name="T44"/></text:p>
      <text:p text:style-name="P42"><text:span text:style-name="T14"/></text:p>
      <text:p text:style-name="P9"><text:span text:style-name="T44"/></text:p>
      <text:p text:style-name="P48"><text:span text:style-name="T25">La voce estimator di GridSearchCV ci permette di </text:span><text:span text:style-name="T26">specificare quale modello utilizzare nell’ottimizzazione, in particolare estimator deve essere una funzione che implementi il metodo .fit() per accettare i dati ti training e il metodo .predict() per </text:span><text:span text:style-name="T27">poter </text:span><text:span text:style-name="T28">confrontare il modello con i dati di testing/validator.</text:span></text:p>
      <text:p text:style-name="P49"><text:soft-page-break/><text:span text:style-name="T25"/></text:p>
      <text:p text:style-name="P10">La voce cv di <text:span text:style-name="T45">GridSearchCV </text:span><text:span text:style-name="T43">ci permette di specificare la procedura di testing del modello (non le metriche da usare che invece sono scelte in scoring); in particolare ho deciso di usare la funzione </text:span><text:span text:style-name="T23">StratifierKFold() </text:span>per ottenere fold omogenei.</text:p>
      <text:p text:style-name="P10"/>
      <text:p text:style-name="P10">In fine per i modelli che necessitano di scalamento voglio che ad ogni fold i dati di training e validator vengano scalati basandosi sui soli dati di training; per fare questo fornisco all’estimator di GridSearchCV una pipeline.</text:p>
      <text:p text:style-name="P10"/>
      <text:p text:style-name="P10"><text:span text:style-name="T55">Pipeline </text:span><text:span text:style-name="T59">di Sklearn</text:span><text:span text:style-name="T86"> - </text:span>L’oggetto Pipeline di sklearn ci permette di concatenare più <text:span text:style-name="T52">oggetti</text:span> <text:span text:style-name="T52">sklearn che verranno eseguite in successione ad ogni fold.</text:span></text:p>
      <text:p text:style-name="P10"/>
      <text:p text:style-name="P11">Nello specifico si definisce una lista di oggetti <text:span text:style-name="T85">i quali devono avere i metodi .fit() e .transform(); l’ultimo oggetto può avere .predict() (cioè deve essere un "estimatore", come un classificatore o un regressore).</text:span></text:p>
      <text:p text:style-name="P11"/>
      <text:p text:style-name="P12">Nel nostro caso, per i modelli che ne hanno bisogno, passiamo a <text:s/><text:span text:style-name="T44">GridSearchCV</text:span><text:span text:style-name="T43">() una pipeline contenente uno scaler in modo da scalare i dati per ogni fold ed evitare che </text:span><text:span text:style-name="T46">la dimenzione delle features infuenzi la loro importanza a training time.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. Inizio leggendo il file csv e suddividendo il dataset in Training e Testing senza normalizzare i valori. In seguito nella cross validation useremo la k-fold per suddividere il Training set in più fold con i Validato.</text:p>
      <text:p text:style-name="P7"/>
      <text:p text:style-name="P7"/>
      <text:p text:style-name="P24"><text:tab/><text:tab/><text:span text:style-name="T102">Ricerca della classe linearmente separabile</text:span></text:p>
      <text:p text:style-name="P24"/>
      <text:p text:style-name="P47"><text:span text:style-name="T11">Durante la cross validation del modello </text:span><text:span text:style-name="T25">LogisticRegression </text:span><text:span text:style-name="T31">sono stati ottimizzati gli iperparametri per ognuna delle tre possibili classi; tuttavia è risultata un accuratezza </text:span><text:span text:style-name="T32">sospetta</text:span><text:span text:style-name="T31"> del 100% sulla classe “Iris-setosa”</text:span></text:p>
      <text:p text:style-name="P47"><text:span text:style-name="T31"/></text:p>
      <text:p text:style-name="P31"><text:soft-page-break/>log:</text:p>
      <text:p text:style-name="P31"/>
      <text:p text:style-name="P31">Fitting 5 folds for each of 96 candidates, totalling 480 fits</text:p>
      <text:p text:style-name="P31">LogisticRegression(Iris-setosa)-----------------------------------------------------------------------------------------</text:p>
      <text:p text:style-name="P31">iperparametri migliori: <text:s/>{'modello__C': 0.001, 'modello__class_weight': None, 'modello__max_iter': 1000, 'modello__penalty': 'l2', 'modello__solver': 'liblinear', 'modello__tol': 0.0001}</text:p>
      <text:p text:style-name="P31">accuratezza del modello: 1.0</text:p>
      <text:p text:style-name="P31">=============================</text:p>
      <text:p text:style-name="P31"/>
      <text:p text:style-name="P32">Mentre le altre due classi hanno ricevuto un accuratezza di 0.72 0.96. Dal momento che, <text:span text:style-name="T103">dagli appunti del dataset,</text:span> una delle classi è linearmente separabile dalle altre non è detto che si tratti di un caso di Overfitting ma per <text:span text:style-name="T97">sicurezza ho ritenuto opportuno testare il modello con i dati di testing sul quale non è stato allenato. </text:span></text:p>
      <text:p text:style-name="P32"/>
      <text:p text:style-name="P33">Dal testing risulta un accuratezza di 0.95; come prima ipotesi mi sembra corretto dire che la classe “Iris-setosa” sia <text:span text:style-name="T98">tra le tre </text:span>quella linearmente separabile dalle altre; tuttavia un punteggio di 0.96 della classe “Iris-virignia” <text:span text:style-name="T104">(ottenuto in cross validation)</text:span> è sospetto <text:span text:style-name="T105">per una classe che non dovrebbe esserlo</text:span>. Ho deciso di testare con il dataset di testing anche questa classe per vedere se l’accuratezza scende.</text:p>
      <text:p text:style-name="P33"><text:line-break/><text:span text:style-name="T99">Alla fine del test sul modello virginica ho ottenuto un accuratezza dello 0.</text:span><text:span text:style-name="T100">64</text:span><text:span text:style-name="T99">; ne deduco che questa classe non sia </text:span><text:span text:style-name="T101">perfettamente </text:span><text:span text:style-name="T99">separabile </text:span><text:span text:style-name="T101">linearmente</text:span><text:span text:style-name="T99"> dalle altre.</text:span></text:p>
      <text:p text:style-name="P33"/>
      <text:p text:style-name="P34"><text:span text:style-name="T53">Conclusione</text:span><text:span text:style-name="T60">1</text:span> - Basandomi sui risultati ottenuti su questi due test ho deciso che per il modello 1-vs-all utilizzerò LogReg per la classe “Iris-setosa” e SVC per le altre due.</text:p>
      <text:p text:style-name="P25"/>
      <text:p text:style-name="P27">Conclusione2 <text:span text:style-name="T61">–</text:span> <text:span text:style-name="T61">Dopo la cross validation il modello più performante per la classe ‘</text:span><text:span text:style-name="T63">Iris-</text:span><text:span text:style-name="T64">v</text:span><text:span text:style-name="T61">irgini</text:span><text:span text:style-name="T67">c</text:span><text:span text:style-name="T61">a’ è si l’SVC ma è stato selezionato un kernel lineare. Questa classe </text:span><text:span text:style-name="T65">sembra a prima vista linearmente separabile dalle altre; tuttavia quando abbiamo testato sul dataset di testing abbiamo ottenuto un accuratezza bassa (0.64) </text:span><text:span text:style-name="T66">inoltre lo stesso provider del dataset ci ha avvisato che solo una classe è linearmente separabile dalle altre.</text:span></text:p>
      <text:p text:style-name="P37"><text:span text:style-name="T18">In conclusione sembra che ‘Iris-serosa’ si trovi lontana dalle altre due classi e sia facimente separabile linearmente da entrambe mentre ‘Iris-versicolor’ e ‘Iris-virginica’ siano vicine e non linearmente separabili. </text:span><text:span text:style-name="T21">Il cross validation ci ha dato un accuratezza alta e ci ha proposto un modello lineare per ‘Iris-virginica’ perché nel 1-vs-all il modello ha riconoscuto correttamente tutti i sample di ‘Iris-setosa’ e quelli più lontani di ‘Iris-versicolor’ ma questo risultato potrebbe essere forviante: un sample di ‘</text:span><text:span text:style-name="T80">Iris-versicolor’ potrebbe confondere il modello virginica; la mia speranza è che il modello versicolor </text:span><text:soft-page-break/><text:span text:style-name="T80">invece distingua sufficientemente bene i prori sample da quelli di ‘Iris-virginica’ essendo quello un modello non lineare.</text:span></text:p>
      <text:p text:style-name="P38"><text:span text:style-name="T80">R</text:span><text:span text:style-name="T79">imango dell’idea che sia opportuno per il 1-vs-all tenere per ‘Iris-virginica’ un modello lineare sperando che il modello di ‘Iris-versicolor’ discrimini sufficientemente questi sample di mezzo.</text:span></text:p>
      <text:p text:style-name="P38"><text:span text:style-name="T79"/></text:p>
      <text:p text:style-name="P39"><text:span text:style-name="T79">‘</text:span><text:span text:style-name="T81">Iris-setosa</text:span><text:span text:style-name="T79">’<text:tab/><text:tab/><text:tab/></text:span><text:span text:style-name="T82">LogReg </text:span><text:span text:style-name="T84">(solver lineare)</text:span></text:p>
      <text:p text:style-name="P39"><text:span text:style-name="T79">‘</text:span><text:span text:style-name="T81">Iris-verticolor</text:span><text:span text:style-name="T79">’<text:tab/><text:tab/></text:span><text:span text:style-name="T82">SVC </text:span><text:span text:style-name="T83">kernel </text:span><text:span text:style-name="T82">non lineare</text:span></text:p>
      <text:p text:style-name="P39"><text:span text:style-name="T79">‘</text:span><text:span text:style-name="T81">Iris-virginica</text:span><text:span text:style-name="T79">’<text:tab/><text:tab/></text:span><text:span text:style-name="T82">SVC </text:span><text:span text:style-name="T83">kernel </text:span><text:span text:style-name="T82">lineare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><text:soft-page-break/><text:tab/><text:tab/>Iperparametri ottimizzati:</text:p>
      <text:p text:style-name="P35"/>
      <text:p text:style-name="P35"/>
      <text:p text:style-name="P41"><text:tab/>K-Nearest-Neighbors</text:p>
      <text:p text:style-name="P41"><text:span text:style-name="T61">In questo modello ottimizziamo </text:span>n_neighbors<text:span text:style-name="T61">, </text:span><text:span text:style-name="T75">se troppo piccolo tenderà ad essere troppo sensibile al rumode overfitting; se troppo grande tenderà </text:span><text:span text:style-name="T76">a restituisce valori poco specifici, underfitting. </text:span><text:span text:style-name="T77">L’ottimizzazione sceglie anche l’algoritmo da adottare (</text:span><text:span text:style-name="T110">algorithm</text:span><text:span text:style-name="T77">)</text:span><text:span text:style-name="T78"> e la metrica per la distanza (</text:span><text:span text:style-name="T111">metric</text:span><text:span text:style-name="T78">).</text:span></text:p>
      <text:p text:style-name="P62"><text:span text:style-name="T78">U</text:span><text:span text:style-name="T61">n altro iperparametro ottimizzato è il size delle foglie (</text:span>leaf_size<text:span text:style-name="T61">)</text:span></text:p>
      <text:p text:style-name="P36"/>
      <text:p text:style-name="P36"/>
      <text:p text:style-name="P41"><text:tab/><text:span text:style-name="T106">Decision Tree</text:span></text:p>
      <text:p text:style-name="P41"><text:span text:style-name="T106">max_depth </text:span><text:span text:style-name="T74">– per fissare la profondità massima dell’albero, se troppo profondo rischia di fare overfitting</text:span></text:p>
      <text:h text:style-name="Heading_20_3" text:outline-level="3"><text:span text:style-name="Source_20_Text"><text:span text:style-name="T25">min_samples_split / min_samples_leaf –</text:span></text:span><text:span text:style-name="Source_20_Text"><text:span text:style-name="T33"> </text:span></text:span><text:span text:style-name="Source_20_Text"><text:span text:style-name="T34">per fissare il numero minimo di </text:span></text:span><text:span text:style-name="Source_20_Text"><text:span text:style-name="T35">sample per dividere un nodo o che deve avere un nodo foglia</text:span></text:span></text:h>
      <text:p text:style-name="P50"><text:span text:style-name="Source_20_Text"><text:span text:style-name="T40">max_features –</text:span></text:span><text:span text:style-name="Source_20_Text"><text:span text:style-name="T36"> numero massimo di features considerate per i test</text:span></text:span></text:p>
      <text:p text:style-name="P51"><text:span text:style-name="Source_20_Text"><text:span text:style-name="T41">criterios</text:span></text:span><text:span text:style-name="Source_20_Text"><text:span text:style-name="T37"> – è il criterio di valutazione dello split</text:span></text:span></text:p>
      <text:p text:style-name="P52"><text:span text:style-name="Source_20_Text"><text:span text:style-name="T42">class_weight</text:span></text:span><text:span text:style-name="Source_20_Text"><text:span text:style-name="T38"> – il peso per ogni classe in </text:span></text:span><text:span text:style-name="Source_20_Text"><text:span text:style-name="T39">base al numero di sample nel dataset, non serve se il dataset è bilanciato come in questo caso.</text:span></text:span></text:p>
      <text:p text:style-name="P52"><text:span text:style-name="Source_20_Text"><text:span text:style-name="T39"/></text:span></text:p>
      <text:p text:style-name="P53"><text:tab/>Logistic Regression</text:p>
      <text:p text:style-name="P55">C –<text:span text:style-name="T61"> regolazione </text:span><text:span text:style-name="T68">del modello, parametri che indica quanto penalizzare gli errori </text:span><text:span text:style-name="T69">di classificazione </text:span><text:span text:style-name="T68">durante l’addestramento; </text:span><text:span text:style-name="T70">se troppo piccolo </text:span><text:span text:style-name="T71">il modello tenderà a sbagliare troppo (underfitting); se troppo grande il modello sarà troppo rigoroso (overfitting)</text:span></text:p>
      <text:p text:style-name="P56"><text:span text:style-name="T107">p</text:span>enalty<text:span text:style-name="T61"> – è il tipo di penalità da </text:span><text:span text:style-name="T73">applicare</text:span><text:span text:style-name="T61"> ai coefficienti in modo che non siano più grandi del necessario</text:span></text:p>
      <text:p text:style-name="P57">solver<text:span text:style-name="T61"> – algoritmo di ottimizzazione dei parametri (con </text:span>max_iter<text:span text:style-name="T61"> numero massimo di iterazioni)</text:span></text:p>
      <text:p text:style-name="P58">tol<text:span text:style-name="T61"> – tolleranza nel criterio di stop </text:span></text:p>
      <text:p text:style-name="P54"><text:span text:style-name="T72"/></text:p>
      <text:p text:style-name="P54"><text:span text:style-name="T72"><text:tab/></text:span><text:span text:style-name="T108">SVC</text:span></text:p>
      <text:p text:style-name="P59">Come nella Logistic regression troviamo <text:span text:style-name="T109">la regolazione </text:span><text:span text:style-name="T53">C</text:span></text:p>
      <text:p text:style-name="P59"><text:span text:style-name="T53">Kernel –</text:span> tipo di kernel da applicare per trasformare il features space (<text:span text:style-name="T53">gamma </text:span>che definisce l’influenza del singolo sample)</text:p>
      <text:p text:style-name="P54"><text:span text:style-name="T7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4T11:24:47.886721672</dc:date>
    <meta:editing-duration>PT18H12M54S</meta:editing-duration>
    <meta:editing-cycles>154</meta:editing-cycles>
    <meta:generator>LibreOffice/24.2.7.2$Linux_X86_64 LibreOffice_project/420$Build-2</meta:generator>
    <meta:document-statistic meta:table-count="0" meta:image-count="0" meta:object-count="0" meta:page-count="6" meta:paragraph-count="73" meta:word-count="1400" meta:character-count="9683" meta:non-whitespace-character-count="8308"/>
  </office:meta>
</office:document-meta>
</file>