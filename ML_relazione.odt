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fb09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0c95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3fd74c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fb091" officeooo:paragraph-rsid="00a3d1d1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140088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40088" officeooo:paragraph-rsid="00235b23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1da7e0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35b23" officeooo:paragraph-rsid="00235b23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716a0" officeooo:paragraph-rsid="002716a0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64b04" officeooo:paragraph-rsid="002c8d43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4776a" officeooo:paragraph-rsid="0034776a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3fd74c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4c0dae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0c953d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fd74c" officeooo:paragraph-rsid="00aa9e22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a0d054" officeooo:paragraph-rsid="00a0d054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974b5" officeooo:paragraph-rsid="000fb091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a021c" officeooo:paragraph-rsid="00ba021c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0f9f6" officeooo:paragraph-rsid="0030f9f6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10df7" officeooo:paragraph-rsid="00110df7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5b91" officeooo:paragraph-rsid="00095b91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3a2655" officeooo:paragraph-rsid="003a2655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73ef4" officeooo:paragraph-rsid="002c8d43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e3bbf" officeooo:paragraph-rsid="002e3bbf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1c7a22" officeooo:paragraph-rsid="0021839c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21faf8" officeooo:paragraph-rsid="0021faf8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2f7c9" officeooo:paragraph-rsid="00b2f7c9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39648" officeooo:paragraph-rsid="0021faf8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b39648" officeooo:paragraph-rsid="00b39648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c953d" style:font-size-asian="10.5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0fb091" style:font-size-asian="10.5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0fb091" officeooo:paragraph-rsid="00524397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602614" officeooo:paragraph-rsid="0066bc68" style:font-size-asian="10.5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5e3d34" officeooo:paragraph-rsid="005e3d34" style:font-size-asian="10.5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size="12pt" officeooo:paragraph-rsid="00315fc1" style:font-size-asian="12pt" style:font-size-complex="12pt"/>
    </style:style>
    <style:style style:name="P42" style:family="paragraph" style:parent-style-name="Preformatted_20_Text">
      <style:paragraph-properties fo:text-align="start" style:justify-single-word="false"/>
      <style:text-properties fo:font-size="12pt" officeooo:paragraph-rsid="00a27381" style:font-size-asian="12pt" style:font-size-complex="12pt"/>
    </style:style>
    <style:style style:name="P43" style:family="paragraph" style:parent-style-name="Preformatted_20_Text">
      <style:paragraph-properties fo:text-align="start" style:justify-single-word="false"/>
      <style:text-properties fo:font-size="12pt" officeooo:rsid="001aaa06" officeooo:paragraph-rsid="00315fc1" style:font-size-asian="12pt" style:font-size-complex="12pt"/>
    </style:style>
    <style:style style:name="P44" style:family="paragraph" style:parent-style-name="Preformatted_20_Text">
      <style:paragraph-properties fo:text-align="start" style:justify-single-word="false"/>
      <style:text-properties fo:font-size="12pt" officeooo:rsid="001e894f" officeooo:paragraph-rsid="001e894f" style:font-size-asian="12pt" style:font-size-complex="12pt"/>
    </style:style>
    <style:style style:name="P45" style:family="paragraph" style:parent-style-name="Preformatted_20_Text">
      <style:paragraph-properties fo:text-align="start" style:justify-single-word="false"/>
      <style:text-properties fo:font-size="12pt" officeooo:rsid="0021faf8" officeooo:paragraph-rsid="0021faf8" style:font-size-asian="12pt" style:font-size-complex="12pt"/>
    </style:style>
    <style:style style:name="P46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4e97ad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ize="12pt" fo:font-weight="normal" officeooo:rsid="004e97ad" officeooo:paragraph-rsid="00d002b4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ize="12pt" fo:font-weight="normal" officeooo:rsid="00524397" officeooo:paragraph-rsid="00524397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ize="12pt" fo:font-weight="normal" officeooo:rsid="00742848" officeooo:paragraph-rsid="00742848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ize="12pt" fo:font-weight="normal" officeooo:rsid="0051a6f0" officeooo:paragraph-rsid="0051a6f0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ize="12pt" fo:font-weight="normal" officeooo:rsid="00be6357" officeooo:paragraph-rsid="00be6357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ize="12pt" fo:font-weight="normal" officeooo:rsid="00c621e1" officeooo:paragraph-rsid="00c621e1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size="12pt" fo:font-weight="normal" officeooo:rsid="00cd05ab" officeooo:paragraph-rsid="00cd05ab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size="12pt" fo:font-weight="normal" officeooo:rsid="00cd05ab" officeooo:paragraph-rsid="00d1ea2f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font-size="12pt" fo:font-weight="bold" officeooo:rsid="0069655e" officeooo:paragraph-rsid="0069655e" style:font-size-asian="10.5pt" style:font-weight-asian="bold" style:font-size-complex="12pt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b5422" style:font-size-asian="10.5pt" style:font-weight-asian="bold" style:font-size-complex="12pt" style:font-weight-complex="bold"/>
    </style:style>
    <style:style style:name="P58" style:family="paragraph" style:parent-style-name="Preformatted_20_Text">
      <style:paragraph-properties fo:text-align="start" style:justify-single-word="false"/>
      <style:text-properties fo:font-size="12pt" fo:font-weight="bold" officeooo:rsid="006b5422" officeooo:paragraph-rsid="006d5003" style:font-size-asian="10.5pt" style:font-weight-asian="bold" style:font-size-complex="12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officeooo:paragraph-rsid="002c8d43"/>
    </style:style>
    <style:style style:name="P60" style:family="paragraph" style:parent-style-name="Preformatted_20_Text">
      <style:paragraph-properties fo:text-align="start" style:justify-single-word="false"/>
      <style:text-properties officeooo:paragraph-rsid="002e3bbf"/>
    </style:style>
    <style:style style:name="P61" style:family="paragraph" style:parent-style-name="Preformatted_20_Text">
      <style:paragraph-properties fo:text-align="start" style:justify-single-word="false"/>
      <style:text-properties officeooo:paragraph-rsid="004e97ad"/>
    </style:style>
    <style:style style:name="P62" style:family="paragraph" style:parent-style-name="Preformatted_20_Text">
      <style:paragraph-properties fo:text-align="start" style:justify-single-word="false"/>
      <style:text-properties officeooo:paragraph-rsid="003c7708"/>
    </style:style>
    <style:style style:name="P63" style:family="paragraph" style:parent-style-name="Preformatted_20_Text">
      <style:paragraph-properties fo:text-align="start" style:justify-single-word="false"/>
      <style:text-properties officeooo:paragraph-rsid="00b6ee9f"/>
    </style:style>
    <style:style style:name="P64" style:family="paragraph" style:parent-style-name="Text_20_body">
      <style:text-properties officeooo:paragraph-rsid="007bcd2f"/>
    </style:style>
    <style:style style:name="P65" style:family="paragraph" style:parent-style-name="Text_20_body">
      <style:text-properties officeooo:paragraph-rsid="007d2e29"/>
    </style:style>
    <style:style style:name="P66" style:family="paragraph" style:parent-style-name="Text_20_body">
      <style:text-properties officeooo:paragraph-rsid="007da330"/>
    </style:style>
    <style:style style:name="P67" style:family="paragraph" style:parent-style-name="Text_20_body">
      <style:text-properties style:font-name="Liberation Mono" fo:font-weight="bold" officeooo:rsid="0088a766" officeooo:paragraph-rsid="0088a766" style:font-weight-asian="bold" style:font-weight-complex="bold"/>
    </style:style>
    <style:style style:name="P68" style:family="paragraph" style:parent-style-name="Text_20_body">
      <style:text-properties style:font-name="Liberation Mono" fo:font-weight="bold" officeooo:rsid="008fab6a" officeooo:paragraph-rsid="008fab6a" style:font-weight-asian="bold" style:font-weight-complex="bold"/>
    </style:style>
    <style:style style:name="P69" style:family="paragraph" style:parent-style-name="Text_20_body">
      <style:text-properties style:font-name="Liberation Mono" fo:font-weight="bold" officeooo:rsid="00927849" officeooo:paragraph-rsid="00927849" style:font-weight-asian="bold" style:font-weight-complex="bold"/>
    </style:style>
    <style:style style:name="P70" style:family="paragraph" style:parent-style-name="Text_20_body">
      <style:text-properties style:font-name="Liberation Mono" fo:font-weight="bold" officeooo:rsid="0092f470" officeooo:paragraph-rsid="0092f470" style:font-weight-asian="bold" style:font-weight-complex="bold"/>
    </style:style>
    <style:style style:name="P71" style:family="paragraph" style:parent-style-name="Text_20_body">
      <style:text-properties style:font-name="Liberation Mono" fo:font-weight="normal" officeooo:rsid="0094f559" officeooo:paragraph-rsid="0094f559" style:font-weight-asian="normal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officeooo:rsid="00173ef4" officeooo:paragraph-rsid="002c8d43"/>
    </style:style>
    <style:style style:name="P73" style:family="paragraph" style:parent-style-name="Preformatted_20_Text">
      <style:paragraph-properties fo:text-align="start" style:justify-single-word="false"/>
      <style:text-properties fo:font-size="12pt" fo:font-weight="bold" officeooo:rsid="00c585e5" officeooo:paragraph-rsid="00c585e5" style:font-size-asian="12pt" style:font-weight-asian="bold" style:font-size-complex="12pt" style:font-weight-complex="bold"/>
    </style:style>
    <style:style style:name="P74" style:family="paragraph" style:parent-style-name="Preformatted_20_Text">
      <style:paragraph-properties fo:line-height="115%" fo:text-align="start" style:justify-single-word="false"/>
      <style:text-properties fo:font-size="12pt" fo:font-weight="bold" officeooo:rsid="00742848" officeooo:paragraph-rsid="00966674" style:font-size-asian="12pt" style:font-weight-asian="bold" style:font-size-complex="12pt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font-size="12pt" fo:font-weight="normal" officeooo:rsid="00e72d1e" officeooo:paragraph-rsid="00e72d1e" style:font-size-asian="12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fo:font-size="12pt" fo:font-weight="normal" officeooo:rsid="00e91cc8" officeooo:paragraph-rsid="00e72d1e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fo:font-size="12pt" fo:font-weight="normal" officeooo:rsid="00e91cc8" officeooo:paragraph-rsid="00e91cc8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size="12pt" fo:font-weight="normal" officeooo:rsid="00741ceb" officeooo:paragraph-rsid="00724c45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rsid="00095b91" officeooo:paragraph-rsid="00095b91" style:font-size-asian="20pt" style:font-weight-asian="bold" style:font-size-complex="20pt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color="#c9211e" loext:opacity="100%" fo:font-size="12pt" fo:font-weight="bold" officeooo:rsid="00f08d4c" officeooo:paragraph-rsid="00f08d4c" style:font-size-asian="10.5pt" style:font-weight-asian="bold" style:font-size-complex="12pt" style:font-weight-complex="bold"/>
    </style:style>
    <style:style style:name="P81" style:family="paragraph" style:parent-style-name="Text_20_body">
      <style:text-properties style:font-name="Liberation Mono" fo:font-weight="bold" officeooo:rsid="008115fb" officeooo:paragraph-rsid="00f08d4c" style:font-weight-asian="bold" style:font-weight-complex="bold"/>
    </style:style>
    <style:style style:name="T1" style:family="text">
      <style:text-properties officeooo:rsid="0009ee97"/>
    </style:style>
    <style:style style:name="T2" style:family="text">
      <style:text-properties officeooo:rsid="0012f2f0"/>
    </style:style>
    <style:style style:name="T3" style:family="text">
      <style:text-properties fo:color="#000000" loext:opacity="100%" fo:font-size="12pt" fo:font-weight="normal" officeooo:rsid="00170580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64b04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2c8d43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4e97ad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170580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a37abd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3c7708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3d8a5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3fc0e5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bold" officeooo:rsid="002c97ac" style:font-size-asian="10.5pt" style:font-weight-asian="bold" style:font-size-complex="12pt" style:font-weight-complex="bold"/>
    </style:style>
    <style:style style:name="T14" style:family="text">
      <style:text-properties fo:color="#000000" loext:opacity="100%" fo:font-size="12pt" fo:font-weight="bold" officeooo:rsid="00170580" style:font-size-asian="12pt" style:font-weight-asian="bold" style:font-size-complex="12pt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1aaa06" style:font-weight-asian="normal" style:font-weight-complex="normal"/>
    </style:style>
    <style:style style:name="T17" style:family="text">
      <style:text-properties fo:color="#000000" loext:opacity="100%" fo:font-weight="normal" officeooo:rsid="001da7e0" style:font-weight-asian="normal" style:font-weight-complex="normal"/>
    </style:style>
    <style:style style:name="T18" style:family="text">
      <style:text-properties fo:color="#000000" loext:opacity="100%" fo:font-weight="normal" officeooo:rsid="006ab6ad" style:font-weight-asian="normal" style:font-weight-complex="normal"/>
    </style:style>
    <style:style style:name="T19" style:family="text">
      <style:text-properties fo:color="#000000" loext:opacity="100%" fo:font-weight="normal" officeooo:rsid="00c04110" style:font-weight-asian="normal" style:font-weight-complex="normal"/>
    </style:style>
    <style:style style:name="T20" style:family="text">
      <style:text-properties fo:color="#000000" loext:opacity="100%" fo:font-weight="normal" officeooo:rsid="00c07cff" style:font-weight-asian="normal" style:font-weight-complex="normal"/>
    </style:style>
    <style:style style:name="T21" style:family="text">
      <style:text-properties officeooo:rsid="0019b046"/>
    </style:style>
    <style:style style:name="T22" style:family="text">
      <style:text-properties officeooo:rsid="001aaa06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1839c" style:font-size-asian="12pt" style:font-size-complex="12pt"/>
    </style:style>
    <style:style style:name="T25" style:family="text">
      <style:text-properties fo:font-size="12pt" officeooo:rsid="003d29b7" style:font-size-asian="12pt" style:font-size-complex="12pt"/>
    </style:style>
    <style:style style:name="T26" style:family="text">
      <style:text-properties fo:font-size="12pt" officeooo:rsid="003d8a50" style:font-size-asian="12pt" style:font-size-complex="12pt"/>
    </style:style>
    <style:style style:name="T27" style:family="text">
      <style:text-properties fo:font-size="12pt" officeooo:rsid="004e97ad" style:font-size-asian="12pt" style:font-size-complex="12pt"/>
    </style:style>
    <style:style style:name="T28" style:family="text">
      <style:text-properties fo:font-size="12pt" officeooo:rsid="0059db9a" style:font-size-asian="12pt" style:font-size-complex="12pt"/>
    </style:style>
    <style:style style:name="T29" style:family="text">
      <style:text-properties fo:font-size="12pt" officeooo:rsid="001da7e0" style:font-size-asian="12pt" style:font-size-complex="12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7b175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b67b7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7bcd2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cbfad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7d2e29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e95dd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f4cc7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a37ab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a3cbe3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d90697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d9bedd" style:font-size-asian="12pt" style:font-weight-asian="normal" style:font-size-complex="12pt" style:font-weight-complex="normal"/>
    </style:style>
    <style:style style:name="T42" style:family="text">
      <style:text-properties fo:font-size="12pt" fo:font-weight="bold" officeooo:rsid="007bcd2f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7cbfad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7d2e29" style:font-size-asian="12pt" style:font-weight-asian="bold" style:font-size-complex="12pt" style:font-weight-complex="bold"/>
    </style:style>
    <style:style style:name="T45" style:family="text">
      <style:text-properties style:font-size-asian="12pt"/>
    </style:style>
    <style:style style:name="T46" style:family="text">
      <style:text-properties officeooo:rsid="001da7e0" style:font-size-asian="12pt"/>
    </style:style>
    <style:style style:name="T47" style:family="text">
      <style:text-properties officeooo:rsid="0028d61b" style:font-size-asian="12pt"/>
    </style:style>
    <style:style style:name="T48" style:family="text">
      <style:text-properties officeooo:rsid="002e3bbf" style:font-size-asian="12pt"/>
    </style:style>
    <style:style style:name="T49" style:family="text">
      <style:text-properties officeooo:rsid="002ff3be" style:font-size-asian="12pt"/>
    </style:style>
    <style:style style:name="T50" style:family="text">
      <style:text-properties officeooo:rsid="00361d90" style:font-size-asian="12pt"/>
    </style:style>
    <style:style style:name="T51" style:family="text">
      <style:text-properties officeooo:rsid="0044c954" style:font-size-asian="12pt"/>
    </style:style>
    <style:style style:name="T52" style:family="text">
      <style:text-properties officeooo:rsid="00a99a49" style:font-size-asian="12pt"/>
    </style:style>
    <style:style style:name="T53" style:family="text">
      <style:text-properties officeooo:rsid="00265e9a" style:font-size-asian="12pt"/>
    </style:style>
    <style:style style:name="T54" style:family="text">
      <style:text-properties officeooo:rsid="00235b23" style:font-size-asian="12pt"/>
    </style:style>
    <style:style style:name="T55" style:family="text">
      <style:text-properties officeooo:rsid="001dc92f"/>
    </style:style>
    <style:style style:name="T56" style:family="text">
      <style:text-properties officeooo:rsid="00235b2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4c714" style:font-weight-asian="bold" style:font-weight-complex="bold"/>
    </style:style>
    <style:style style:name="T59" style:family="text">
      <style:text-properties fo:font-weight="bold" officeooo:rsid="002b352c" style:font-weight-asian="bold" style:font-weight-complex="bold"/>
    </style:style>
    <style:style style:name="T60" style:family="text">
      <style:text-properties fo:font-weight="bold" officeooo:rsid="003fd74c" style:font-weight-asian="bold" style:font-weight-complex="bold"/>
    </style:style>
    <style:style style:name="T61" style:family="text">
      <style:text-properties fo:font-weight="bold" officeooo:rsid="00112bdf" style:font-weight-asian="bold" style:font-weight-complex="bold"/>
    </style:style>
    <style:style style:name="T62" style:family="text">
      <style:text-properties fo:font-weight="bold" officeooo:rsid="00b8ed01" style:font-weight-asian="bold" style:font-weight-complex="bold"/>
    </style:style>
    <style:style style:name="T63" style:family="text">
      <style:text-properties fo:font-weight="bold" officeooo:rsid="00cb4401" style:font-weight-asian="bold" style:font-weight-complex="bold"/>
    </style:style>
    <style:style style:name="T64" style:family="text">
      <style:text-properties fo:font-weight="bold" officeooo:rsid="00724c45" style:font-weight-asian="bold" style:font-weight-complex="bold"/>
    </style:style>
    <style:style style:name="T65" style:family="text">
      <style:text-properties fo:font-weight="bold" style:font-size-asian="12pt" style:font-weight-asian="bold" style:font-weight-complex="bold"/>
    </style:style>
    <style:style style:name="T66" style:family="text">
      <style:text-properties fo:font-weight="bold" officeooo:rsid="00ae3af7" style:font-size-asian="12pt" style:font-weight-asian="bold" style:font-weight-complex="bold"/>
    </style:style>
    <style:style style:name="T67" style:family="text">
      <style:text-properties fo:font-weight="bold" officeooo:rsid="00265e9a" style:font-size-asian="12pt" style:font-weight-asian="bold" style:font-weight-complex="bold"/>
    </style:style>
    <style:style style:name="T68" style:family="text">
      <style:text-properties fo:font-weight="bold" officeooo:rsid="004aa7b0" style:font-size-asian="12pt" style:font-weight-asian="bold" style:font-weight-complex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61d9c4" style:font-weight-asian="normal" style:font-weight-complex="normal"/>
    </style:style>
    <style:style style:name="T71" style:family="text">
      <style:text-properties fo:font-weight="normal" officeooo:rsid="006624eb" style:font-weight-asian="normal" style:font-weight-complex="normal"/>
    </style:style>
    <style:style style:name="T72" style:family="text">
      <style:text-properties fo:font-weight="normal" officeooo:rsid="00688ed3" style:font-weight-asian="normal" style:font-weight-complex="normal"/>
    </style:style>
    <style:style style:name="T73" style:family="text">
      <style:text-properties fo:font-weight="normal" officeooo:rsid="0069655e" style:font-weight-asian="normal" style:font-weight-complex="normal"/>
    </style:style>
    <style:style style:name="T74" style:family="text">
      <style:text-properties fo:font-weight="normal" officeooo:rsid="006b7c73" style:font-weight-asian="normal" style:font-weight-complex="normal"/>
    </style:style>
    <style:style style:name="T75" style:family="text">
      <style:text-properties fo:font-weight="normal" officeooo:rsid="0082d90b" style:font-weight-asian="normal" style:font-weight-complex="normal"/>
    </style:style>
    <style:style style:name="T76" style:family="text">
      <style:text-properties fo:font-weight="normal" officeooo:rsid="008355ff" style:font-weight-asian="normal" style:font-weight-complex="normal"/>
    </style:style>
    <style:style style:name="T77" style:family="text">
      <style:text-properties fo:font-weight="normal" officeooo:rsid="00853700" style:font-weight-asian="normal" style:font-weight-complex="normal"/>
    </style:style>
    <style:style style:name="T78" style:family="text">
      <style:text-properties fo:font-weight="normal" officeooo:rsid="0086b4fa" style:font-weight-asian="normal" style:font-weight-complex="normal"/>
    </style:style>
    <style:style style:name="T79" style:family="text">
      <style:text-properties fo:font-weight="normal" officeooo:rsid="0089f72e" style:font-weight-asian="normal" style:font-weight-complex="normal"/>
    </style:style>
    <style:style style:name="T80" style:family="text">
      <style:text-properties fo:font-weight="normal" officeooo:rsid="00911928" style:font-weight-asian="normal" style:font-weight-complex="normal"/>
    </style:style>
    <style:style style:name="T81" style:family="text">
      <style:text-properties fo:font-weight="normal" officeooo:rsid="0078151a" style:font-weight-asian="normal" style:font-weight-complex="normal"/>
    </style:style>
    <style:style style:name="T82" style:family="text">
      <style:text-properties fo:font-weight="normal" officeooo:rsid="00757273" style:font-weight-asian="normal" style:font-weight-complex="normal"/>
    </style:style>
    <style:style style:name="T83" style:family="text">
      <style:text-properties fo:font-weight="normal" officeooo:rsid="0076169d" style:font-weight-asian="normal" style:font-weight-complex="normal"/>
    </style:style>
    <style:style style:name="T84" style:family="text">
      <style:text-properties fo:font-weight="normal" officeooo:rsid="009c2b39" style:font-weight-asian="normal" style:font-weight-complex="normal"/>
    </style:style>
    <style:style style:name="T85" style:family="text">
      <style:text-properties fo:font-weight="normal" officeooo:rsid="009c4a5a" style:font-weight-asian="normal" style:font-weight-complex="normal"/>
    </style:style>
    <style:style style:name="T86" style:family="text">
      <style:text-properties fo:font-weight="normal" officeooo:rsid="00a6a3f0" style:font-weight-asian="normal" style:font-weight-complex="normal"/>
    </style:style>
    <style:style style:name="T87" style:family="text">
      <style:text-properties fo:font-weight="normal" officeooo:rsid="00a77ea7" style:font-weight-asian="normal" style:font-weight-complex="normal"/>
    </style:style>
    <style:style style:name="T88" style:family="text">
      <style:text-properties fo:font-weight="normal" officeooo:rsid="00ab4ca4" style:font-weight-asian="normal" style:font-weight-complex="normal"/>
    </style:style>
    <style:style style:name="T89" style:family="text">
      <style:text-properties fo:font-weight="normal" officeooo:rsid="00a4a7d0" style:font-weight-asian="normal" style:font-weight-complex="normal"/>
    </style:style>
    <style:style style:name="T90" style:family="text">
      <style:text-properties fo:font-weight="normal" officeooo:rsid="00dcdcb5" style:font-weight-asian="normal" style:font-weight-complex="normal"/>
    </style:style>
    <style:style style:name="T91" style:family="text">
      <style:text-properties fo:font-weight="normal" officeooo:rsid="00deb454" style:font-weight-asian="normal" style:font-weight-complex="normal"/>
    </style:style>
    <style:style style:name="T92" style:family="text">
      <style:text-properties fo:font-weight="normal" officeooo:rsid="00e76f75" style:font-weight-asian="normal" style:font-weight-complex="normal"/>
    </style:style>
    <style:style style:name="T93" style:family="text">
      <style:text-properties fo:font-weight="normal" officeooo:rsid="0082b2ac" style:font-weight-asian="normal" style:font-weight-complex="normal"/>
    </style:style>
    <style:style style:name="T94" style:family="text">
      <style:text-properties fo:font-weight="normal" style:font-size-asian="12pt" style:font-weight-asian="normal" style:font-weight-complex="normal"/>
    </style:style>
    <style:style style:name="T95" style:family="text">
      <style:text-properties fo:font-weight="normal" officeooo:rsid="006ab6ad" style:font-size-asian="12pt" style:font-weight-asian="normal" style:font-weight-complex="normal"/>
    </style:style>
    <style:style style:name="T96" style:family="text">
      <style:text-properties fo:font-weight="normal" officeooo:rsid="006d5003" style:font-size-asian="12pt" style:font-weight-asian="normal" style:font-weight-complex="normal"/>
    </style:style>
    <style:style style:name="T97" style:family="text">
      <style:text-properties fo:font-weight="normal" officeooo:rsid="006e185c" style:font-size-asian="12pt" style:font-weight-asian="normal" style:font-weight-complex="normal"/>
    </style:style>
    <style:style style:name="T98" style:family="text">
      <style:text-properties fo:font-weight="normal" officeooo:rsid="009a5b85" style:font-size-asian="12pt" style:font-weight-asian="normal" style:font-weight-complex="normal"/>
    </style:style>
    <style:style style:name="T99" style:family="text">
      <style:text-properties fo:font-weight="normal" officeooo:rsid="009bc073" style:font-size-asian="12pt" style:font-weight-asian="normal" style:font-weight-complex="normal"/>
    </style:style>
    <style:style style:name="T100" style:family="text">
      <style:text-properties fo:font-weight="normal" officeooo:rsid="00c0a7be" style:font-size-asian="12pt" style:font-weight-asian="normal" style:font-weight-complex="normal"/>
    </style:style>
    <style:style style:name="T101" style:family="text">
      <style:text-properties fo:font-weight="normal" officeooo:rsid="00c3b990" style:font-size-asian="12pt" style:font-weight-asian="normal" style:font-weight-complex="normal"/>
    </style:style>
    <style:style style:name="T102" style:family="text">
      <style:text-properties fo:font-weight="normal" officeooo:rsid="00c585e5" style:font-size-asian="12pt" style:font-weight-asian="normal" style:font-weight-complex="normal"/>
    </style:style>
    <style:style style:name="T103" style:family="text">
      <style:text-properties fo:font-weight="normal" officeooo:rsid="00e639c1" style:font-size-asian="12pt" style:font-weight-asian="normal" style:font-weight-complex="normal"/>
    </style:style>
    <style:style style:name="T104" style:family="text">
      <style:text-properties officeooo:rsid="00254d8e"/>
    </style:style>
    <style:style style:name="T105" style:family="text">
      <style:text-properties officeooo:rsid="002ff3be"/>
    </style:style>
    <style:style style:name="T106" style:family="text">
      <style:text-properties officeooo:rsid="00338134"/>
    </style:style>
    <style:style style:name="T107" style:family="text">
      <style:text-properties officeooo:rsid="0035304e"/>
    </style:style>
    <style:style style:name="T108" style:family="text">
      <style:text-properties officeooo:rsid="00361d90"/>
    </style:style>
    <style:style style:name="T109" style:family="text">
      <style:text-properties officeooo:rsid="004c0dae"/>
    </style:style>
    <style:style style:name="T110" style:family="text">
      <style:text-properties officeooo:rsid="003a2655"/>
    </style:style>
    <style:style style:name="T111" style:family="text">
      <style:text-properties officeooo:rsid="00522c29"/>
    </style:style>
    <style:style style:name="T112" style:family="text">
      <style:text-properties officeooo:rsid="0053a533"/>
    </style:style>
    <style:style style:name="T113" style:family="text">
      <style:text-properties officeooo:rsid="0056d06b"/>
    </style:style>
    <style:style style:name="T114" style:family="text">
      <style:text-properties officeooo:rsid="0057490e"/>
    </style:style>
    <style:style style:name="T115" style:family="text">
      <style:text-properties officeooo:rsid="0057be10"/>
    </style:style>
    <style:style style:name="T116" style:family="text">
      <style:text-properties officeooo:rsid="00585bd6"/>
    </style:style>
    <style:style style:name="T117" style:family="text">
      <style:text-properties officeooo:rsid="005aad9f"/>
    </style:style>
    <style:style style:name="T118" style:family="text">
      <style:text-properties officeooo:rsid="005b314a"/>
    </style:style>
    <style:style style:name="T119" style:family="text">
      <style:text-properties officeooo:rsid="005b3e16"/>
    </style:style>
    <style:style style:name="T120" style:family="text">
      <style:text-properties officeooo:rsid="0078151a"/>
    </style:style>
    <style:style style:name="T121" style:family="text">
      <style:text-properties officeooo:rsid="0086b4fa"/>
    </style:style>
    <style:style style:name="T122" style:family="text">
      <style:text-properties officeooo:rsid="0094e12e"/>
    </style:style>
    <style:style style:name="T123" style:family="text">
      <style:text-properties officeooo:rsid="00989e0e"/>
    </style:style>
    <style:style style:name="T124" style:family="text">
      <style:text-properties officeooo:rsid="009c2b39"/>
    </style:style>
    <style:style style:name="T125" style:family="text">
      <style:text-properties officeooo:rsid="009c4a5a"/>
    </style:style>
    <style:style style:name="T126" style:family="text">
      <style:text-properties officeooo:rsid="00a1b6cd"/>
    </style:style>
    <style:style style:name="T127" style:family="text">
      <style:text-properties officeooo:rsid="00a1cf22"/>
    </style:style>
    <style:style style:name="T128" style:family="text">
      <style:text-properties officeooo:rsid="003d8a50"/>
    </style:style>
    <style:style style:name="T129" style:family="text">
      <style:text-properties officeooo:rsid="003ae10a"/>
    </style:style>
    <style:style style:name="T130" style:family="text">
      <style:text-properties officeooo:rsid="00a27381"/>
    </style:style>
    <style:style style:name="T131" style:family="text">
      <style:text-properties officeooo:rsid="00aa9e22"/>
    </style:style>
    <style:style style:name="T132" style:family="text">
      <style:text-properties officeooo:rsid="00b433c3"/>
    </style:style>
    <style:style style:name="T133" style:family="text">
      <style:text-properties officeooo:rsid="001ff8ad"/>
    </style:style>
    <style:style style:name="T134" style:family="text">
      <style:text-properties officeooo:rsid="0021839c"/>
    </style:style>
    <style:style style:name="T135" style:family="text">
      <style:text-properties officeooo:rsid="0021faf8"/>
    </style:style>
    <style:style style:name="T136" style:family="text">
      <style:text-properties officeooo:rsid="001e894f"/>
    </style:style>
    <style:style style:name="T137" style:family="text">
      <style:text-properties fo:color="#55308d" loext:opacity="100%" officeooo:rsid="001da7e0" style:font-size-asian="12pt"/>
    </style:style>
    <style:style style:name="T138" style:family="text">
      <style:text-properties fo:color="#55308d" loext:opacity="100%" fo:font-size="12pt" style:font-size-asian="12pt" style:font-size-complex="12pt"/>
    </style:style>
    <style:style style:name="T139" style:family="text">
      <style:text-properties officeooo:rsid="00bbb409"/>
    </style:style>
    <style:style style:name="T140" style:family="text">
      <style:text-properties officeooo:rsid="00bd8dd2"/>
    </style:style>
    <style:style style:name="T141" style:family="text">
      <style:text-properties officeooo:rsid="00c81835"/>
    </style:style>
    <style:style style:name="T142" style:family="text">
      <style:text-properties officeooo:rsid="00ca3ff1"/>
    </style:style>
    <style:style style:name="T143" style:family="text">
      <style:text-properties officeooo:rsid="00caf712"/>
    </style:style>
    <style:style style:name="T144" style:family="text">
      <style:text-properties officeooo:rsid="00d696ff"/>
    </style:style>
    <style:style style:name="T145" style:family="text">
      <style:text-properties officeooo:rsid="00db19c0"/>
    </style:style>
    <style:style style:name="T146" style:family="text">
      <style:text-properties officeooo:rsid="00e07999"/>
    </style:style>
    <style:style style:name="T147" style:family="text">
      <style:text-properties officeooo:rsid="00e2748d"/>
    </style:style>
    <style:style style:name="T148" style:family="text">
      <style:text-properties officeooo:rsid="00e2b20b"/>
    </style:style>
    <style:style style:name="T149" style:family="text">
      <style:text-properties officeooo:rsid="00e41eae"/>
    </style:style>
    <style:style style:name="T150" style:family="text">
      <style:text-properties officeooo:rsid="00e9650c"/>
    </style:style>
    <style:style style:name="T151" style:family="text">
      <style:text-properties officeooo:rsid="00eea9ff"/>
    </style:style>
    <style:style style:name="T152" style:family="text">
      <style:text-properties officeooo:rsid="0082b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_ML</text:p>
      <text:p text:style-name="P80">Luca Fiaccadori (matricola 190250)</text:p>
      <text:p text:style-name="P1"/>
      <text:p text:style-name="P1"/>
      <text:p text:style-name="P7"><text:tab/><text:tab/><text:tab/><text:span text:style-name="T59">Introduzione</text:span></text:p>
      <text:p text:style-name="P21"/>
      <text:p text:style-name="P21">In questa relazione tratteremo un task di classificazione multiclasse; Dati 4 features dovremo estrapolare la classe di appartenenza tra le tre possibili. Ho deciso di sviluppare in parallelo due soluzioni diverse:</text:p>
      <text:p text:style-name="P21">1. un singolo modello multiclasse ottimizzato </text:p>
      <text:p text:style-name="P21">2. un sistema 1-vs-all in cui per ogni classe ottimizzo un singolo modello di classificazione binaria (caso più interessante in quanto sfrutta la natura del dataset come vedremo)</text:p>
      <text:p text:style-name="P7"/>
      <text:p text:style-name="P7"><text:span text:style-name="T61">Informazioni sul </text:span><text:span text:style-name="T57">Dataset</text:span>:</text:p>
      <text:p text:style-name="P7">il dataset Iris offre 150 sample da 4 features float e una label che può assumere 3 classi di valori: Iris-setosa, Iris-versicolor e Iris-virginica.</text:p>
      <text:p text:style-name="P7">Il dataset è gia omogeneo in quanto offre 50 campioni per ogni classe e questo semplifica molto il lavoro.</text:p>
      <text:p text:style-name="P26"/>
      <text:p text:style-name="P42"><text:span text:style-name="T110">Tra le informazioni del dataset </text:span><text:span text:style-name="T128">(Iris.names)</text:span><text:span text:style-name="T110"> </text:span><text:span text:style-name="T129">ho appreso che una delle 3 classi è liearmente separabile </text:span><text:span text:style-name="T128">dalle altre </text:span><text:span text:style-name="T130">e intendo sfruttare questa caratteristica nel sistema 1-vs-all.</text:span></text:p>
      <text:p text:style-name="P27"/>
      <text:p text:style-name="P2">Il grande problema di questo dataset è che contiene pochi sample <text:span text:style-name="T1">(150)</text:span>, per questo motivo ho deciso di tenere solo il <text:span text:style-name="T144">30</text:span><text:span text:style-name="T1">%</text:span> <text:span text:style-name="T1">dei </text:span>campioni dei dati come testing set per il modello finale.</text:p>
      <text:p text:style-name="P2"/>
      <text:p text:style-name="P2">Sul training set ho deciso di <text:span text:style-name="T2">adottare la k-fold con k=</text:span><text:span text:style-name="T126">5</text:span><text:span text:style-name="T2"> per suddividere il dataset di training durante l’ottimizzazione degli iperparametri e la scelta del modello</text:span></text:p>
      <text:p text:style-name="P4"/>
      <text:p text:style-name="P4"/>
      <text:p text:style-name="P36"><text:tab/><text:tab/><text:span text:style-name="T106">Scelte dei modelli da testare</text:span></text:p>
      <text:p text:style-name="P36"/>
      <text:p text:style-name="P15">Trattandosi di un task di classificazione <text:span text:style-name="T107">multiclasse </text:span><text:span text:style-name="T108">sicuramente vorrei testare i modelli DecisionTreeClassifier() e KneighborsClassifier(); oltre a questi vorrei testare un </text:span><text:span text:style-name="T127">sistema</text:span><text:span text:style-name="T108"> 1-vs-all.</text:span></text:p>
      <text:p text:style-name="P15"/>
      <text:p text:style-name="P16"><text:span text:style-name="T108">Dec</text:span><text:span text:style-name="T50">isionTreeClassifier </text:span><text:span text:style-name="T45">e </text:span><text:span text:style-name="T50">KneighborsClassifier </text:span><text:span text:style-name="T45">verranno ottimizzate singolarmente in quanto gia supportano il multiclass; per quanto riguarda il metodo 1-vs-all non voglio usare la soluzione di sklearn OneVsRestClassifier() perché mi vincola ad usare l</text:span><text:span text:style-name="T51">a stessa tipologia di</text:span><text:span text:style-name="T45"> modello per tutte le </text:span><text:span text:style-name="T52">classi</text:span><text:span text:style-name="T45">.</text:span></text:p>
      <text:p text:style-name="P28"/>
      <text:p text:style-name="P6"><text:tab/><text:tab/><text:span text:style-name="T60">1-vs-all</text:span></text:p>
      <text:p text:style-name="P28"/>
      <text:p text:style-name="P62"><text:span text:style-name="T9">Per sfruttare il fatto che una classe sia linearmente separabile </text:span><text:soft-page-break/><text:span text:style-name="T9">dalle altre ho deciso che </text:span><text:span text:style-name="T10">tra i modelli da </text:span><text:span text:style-name="T11">scegliere</text:span><text:span text:style-name="T10"> per ogni classe userò un</text:span><text:span text:style-name="T12"> </text:span><text:span text:style-name="Source_20_Text"><text:span text:style-name="T23">LogisticRegression</text:span></text:span><text:span text:style-name="Source_20_Text"><text:span text:style-name="T25">() </text:span></text:span><text:span text:style-name="Source_20_Text"><text:span text:style-name="T26">e un </text:span></text:span><text:span text:style-name="Source_20_Text"><text:span text:style-name="Strong_20_Emphasis"><text:span text:style-name="T30">SVC</text:span></text:span></text:span><text:span text:style-name="Source_20_Text"><text:span text:style-name="T37">() </text:span></text:span><text:span text:style-name="Source_20_Text"><text:span text:style-name="T38">con kernel sia lineare che gaussiano.</text:span></text:span><text:span text:style-name="Source_20_Text"><text:span text:style-name="T39"> Dovrò quindi per ogni classe </text:span></text:span><text:span text:style-name="Source_20_Text"><text:span text:style-name="T40">ottimizzare</text:span></text:span><text:span text:style-name="Source_20_Text"><text:span text:style-name="T39"> tutte le tipologie di modello (lineari e non). Mi aspetto che la cross validation mi selezioni 2 modelli non lineari e uno lineare </text:span></text:span><text:span text:style-name="Source_20_Text"><text:span text:style-name="T41">sulla base delle informazioni date</text:span></text:span><text:span text:style-name="Source_20_Text"><text:span text:style-name="T39">.</text:span></text:span></text:p>
      <text:p text:style-name="P19"><text:span text:style-name="Source_20_Text"/></text:p>
      <text:p text:style-name="P18"><text:span text:style-name="Source_20_Text"><text:span text:style-name="T109">La funzione di aggregazione che interpreterà i modelli (gia ottimizzati) deve essere fatta a mano visti i limiti di <text:s/></text:span></text:span><text:span text:style-name="Source_20_Text"><text:span text:style-name="T110">OneVsRestClassifier</text:span></text:span><text:span text:style-name="Source_20_Text"><text:span text:style-name="T109">()</text:span></text:span></text:p>
      <text:p text:style-name="P17"><text:span text:style-name="Source_20_Text"/></text:p>
      <text:p text:style-name="P20"><text:span text:style-name="Source_20_Text"><text:span text:style-name="T131">Fino alla fase di </text:span></text:span><text:span text:style-name="Source_20_Text"><text:span text:style-name="T145">Cross validation</text:span></text:span><text:span text:style-name="Source_20_Text"><text:span text:style-name="T131"> quindi i modelli binari verranno ottimizzati singolarmente, sarà solo durante il testing che dovrò definire una funzione di aggregazione per interpretare le probabilità.</text:span></text:span></text:p>
      <text:p text:style-name="P5"/>
      <text:p text:style-name="P40">Softmax –<text:span text:style-name="T69"> Addestrati </text:span><text:span text:style-name="T88">e ottimizzati</text:span><text:span text:style-name="T69"> i tre modelli binari estrapolo in fase di testing le loro probabilità e le interpreto con una funzione softmax in modo da ottenere non solo la classe più probabile sencondo il modello ma anche il grado di sicurezza che ha. </text:span><text:span text:style-name="T89">Questa funzione è tale da </text:span><text:span text:style-name="T90">restituire</text:span><text:span text:style-name="T89"> 3 probabilità la cui somma è uguale a 1, </text:span><text:span text:style-name="T86">accettando i singoli punteggi di probabilità di ogni modello di classificazione binari</text:span><text:span text:style-name="T91">a</text:span><text:span text:style-name="T87">.</text:span></text:p>
      <text:p text:style-name="P4"><text:tab/><text:tab/></text:p>
      <text:p text:style-name="P4"/>
      <text:p text:style-name="P60"><text:span text:style-name="T4"><text:tab/><text:tab/></text:span><text:span text:style-name="T14">_valutatore_kfold</text:span><text:span text:style-name="T13">()</text:span></text:p>
      <text:p text:style-name="P59"><text:span text:style-name="T4"/></text:p>
      <text:p text:style-name="P59"><text:span text:style-name="T4">FONTE:<text:tab/></text:span><text:a xlink:type="simple" xlink:href="https://scikit-learn.org/stable/modules/generated/sklearn.model_selection.StratifiedKFold.html" text:style-name="Internet_20_link" text:visited-style-name="Visited_20_Internet_20_Link"><text:span text:style-name="T5">doc StratifiedKFold</text:span></text:a></text:p>
      <text:p text:style-name="P14"/>
      <text:p text:style-name="P59"><text:span text:style-name="T3">Inizialmente ho pensato di implementare le funzioni del cross validation a mano per rendere i passaggi espliciti e per questo ho deciso di definire </text:span><text:span text:style-name="T8">“_valutatore_kfold”.</text:span></text:p>
      <text:p text:style-name="P59"><text:span text:style-name="T8"/></text:p>
      <text:p text:style-name="P72"><text:span text:style-name="T8">“_valutatore_kfold” </text:span><text:span text:style-name="T7">si occupa di testare un modello gia definito (iperparametri gia fissati) in k-fold omogenei, restituendo la media dei valutatori.</text:span></text:p>
      <text:p text:style-name="P72"><text:span text:style-name="T7"/></text:p>
      <text:p text:style-name="P29">L’idea era quella di chiamare “_valutatore_kfold” all’interno di un ciclo che testasse per ogni modello le varie combinazioni di iperparametri.</text:p>
      <text:p text:style-name="P29"/>
      <text:p text:style-name="P30">Ad ogni fold il dataset veniva partizionato tramite S<text:span text:style-name="T105">tratifiedKFold() che, a differenza di Kfold(), divide il dataset in sottogruppi omogenei.</text:span></text:p>
      <text:p text:style-name="P23"/>
      <text:p text:style-name="P22">In seguito ho deciso però di adottare le funzioni di libreria e tenere _valutatore_kfold come dimostrazione del funzionamento di <text:span text:style-name="T48">S</text:span><text:span text:style-name="T49">tratifiedKFold()</text:span></text:p>
      <text:p text:style-name="P22"><text:span text:style-name="T49"/></text:p>
      <text:p text:style-name="P22"><text:span text:style-name="T49"><text:tab/><text:tab/></text:span><text:span text:style-name="T66">Ottimizzazione iperpatametri: GrifSearchCV()</text:span></text:p>
      <text:p text:style-name="P25"/>
      <text:p text:style-name="P41"><text:span text:style-name="T16">L’ottimizzazione degli iperparametri è eseguita tramite la funzione </text:span><text:span text:style-name="T17">GridSearchCV</text:span><text:span text:style-name="T22">().</text:span></text:p>
      <text:p text:style-name="P43"><text:soft-page-break/><text:span text:style-name="T105">Questa funzione esegue l’intero processo di cross validation </text:span><text:span text:style-name="T55">variando gli iperparametri e provando tutte le combinazioni fornite.</text:span></text:p>
      <text:p text:style-name="P3"><text:tab/></text:p>
      <text:p text:style-name="P3"><text:tab/><text:tab/><text:span text:style-name="T58">Configurazione di GridSearchCV()</text:span></text:p>
      <text:p text:style-name="P3"/>
      <text:p text:style-name="P10"><text:span text:style-name="T45">FONDE:<text:tab/></text:span><text:a xlink:type="simple" xlink:href="https://scikit-learn.org/stable/modules/generated/sklearn.model_selection.GridSearchCV.html" text:style-name="Internet_20_link" text:visited-style-name="Visited_20_Internet_20_Link"><text:span text:style-name="T137">doc GridSearchCV</text:span></text:a></text:p>
      <text:p text:style-name="P31"/>
      <text:p text:style-name="P44">La voce <text:span text:style-name="T57">estimator</text:span> di GridSearchCV ci permette di <text:span text:style-name="T133">specificare quale modello utilizzare nell’ottimizzazione, in particolare estimator deve essere una funzione che implementi il metodo .fit() per accettare i dati ti training e il metodo .predict() per </text:span><text:span text:style-name="T134">poter </text:span><text:span text:style-name="T135">confrontare il modello con i dati di testing/validator.</text:span></text:p>
      <text:p text:style-name="P45"/>
      <text:p text:style-name="P32">La voce <text:span text:style-name="T57">cv</text:span> di <text:span text:style-name="T136">GridSearchCV </text:span>ci permette di specificare la procedura di testing del modello (non le metriche da usare che invece sono scelte in <text:span text:style-name="T57">scoring</text:span>); in particolare ho deciso di usare la funzione <text:span text:style-name="T21">StratifierKFold() </text:span>per ottenere fold omogenei.</text:p>
      <text:p text:style-name="P33">(se a cv viene fornito un int la funzione usa di default la StratifierKFold)</text:p>
      <text:p text:style-name="P32"/>
      <text:p text:style-name="P32">In fine per i modelli che necessitano di scalamento voglio che ad ogni fold i dati di training e validator vengano scalati basandosi sui soli dati di training <text:span text:style-name="T132">di quel fold</text:span>; per fare questo fornisco all’<text:span text:style-name="T57">estimator</text:span> di GridSearchCV una pipeline.</text:p>
      <text:p text:style-name="P34"/>
      <text:p text:style-name="P35">Era possibile anche scalare i dati prima del cross validation tuttavia eseguendo lo scalamento ad ogni fold non c’è data leaking neanche durante l’ottimizzazione degli iperparametri.</text:p>
      <text:p text:style-name="P32"/>
      <text:p text:style-name="P63"><text:span text:style-name="T29">F</text:span><text:span text:style-name="T24">ONDE:<text:tab/></text:span><text:a xlink:type="simple" xlink:href="https://scikit-learn.org/stable/modules/compose.html#combining-estimators" text:style-name="Internet_20_link" text:visited-style-name="Visited_20_Internet_20_Link"><text:span text:style-name="T138">doc Pipeline</text:span></text:a></text:p>
      <text:p text:style-name="P32"/>
      <text:p text:style-name="P11"><text:span text:style-name="T67">Pipeline </text:span><text:span text:style-name="T68">di Sklearn</text:span><text:span text:style-name="T53"> - </text:span><text:span text:style-name="T45">L’oggetto </text:span><text:span text:style-name="T65">Pipeline</text:span><text:span text:style-name="T45"> di sklearn ci permette di concatenare più </text:span><text:span text:style-name="T54">oggetti</text:span><text:span text:style-name="T45"> </text:span><text:span text:style-name="T54">sklearn che verranno eseguite in successione ad ogni fold</text:span><text:span text:style-name="T56">.</text:span></text:p>
      <text:p text:style-name="P11"/>
      <text:p text:style-name="P12">Nello specifico si definisce una lista di oggetti <text:span text:style-name="T104">i quali devono avere i metodi .fit() e .transform(); l’ultimo oggetto può avere .predict() (cioè deve essere un "estimatore", come un classificatore o un regressore).</text:span></text:p>
      <text:p text:style-name="P12"/>
      <text:p text:style-name="P13">Nel nostro caso, per i modelli che ne hanno bisogno, passiamo a <text:s/><text:span text:style-name="T46">GridSearchCV</text:span><text:span text:style-name="T45">() una pipeline contenente uno scaler in modo da scalare i dati per ogni fold ed evitare che </text:span><text:span text:style-name="T47">la dimenzione delle features infuenzi la loro importanza a training time.</text:span></text:p>
      <text:p text:style-name="P9"/>
      <text:p text:style-name="P8"/>
      <text:p text:style-name="P8"><text:tab/><text:tab/><text:span text:style-name="T62">EDA</text:span></text:p>
      <text:p text:style-name="P8"><text:span text:style-name="T62"/></text:p>
      <text:p text:style-name="P24">Durante la prima fase di EDA, subito dopo aver estratto il dataset tramite pandas, non ho dovuto <text:span text:style-name="T146">apportare modifiche</text:span> in quanto non vi erano valori nulli e i sample al suo interno erano già omogene<text:span text:style-name="T147">i</text:span>.</text:p>
      <text:p text:style-name="P24"/>
      <text:p text:style-name="P24"><text:soft-page-break/>Tuttavia ho dovuto generare le etichette per i classificatori binari in quanto, per ogni modello, le lable non dovevano assumere il valore della classe bensì un valore binario (0 o 1) a seconda dell’appartenenza della classe studiata.</text:p>
      <text:p text:style-name="P8"/>
      <text:p text:style-name="P8"/>
      <text:p text:style-name="P37"><text:tab/><text:tab/><text:span text:style-name="T116">Ricerca della classe linearmente separabile</text:span></text:p>
      <text:p text:style-name="P37"/>
      <text:p text:style-name="P61"><text:span text:style-name="T6">Durante la cross validation del modello </text:span><text:span text:style-name="T23">LogisticRegression </text:span><text:span text:style-name="T27">sono stati ottimizzati gli iperparametri per ognuna delle tre possibili classi; tuttavia è risultata un accuratezza </text:span><text:span text:style-name="T28">sospetta</text:span><text:span text:style-name="T27"> del 100% sulla classe “Iris-setosa”</text:span></text:p>
      <text:p text:style-name="P61"><text:span text:style-name="T27"/></text:p>
      <text:p text:style-name="P46"><text:span text:style-name="T148">file di </text:span>log:</text:p>
      <text:p text:style-name="P46"/>
      <text:p text:style-name="P46">Fitting 5 folds for each of 96 candidates, totalling 480 fits</text:p>
      <text:p text:style-name="P46">LogisticRegression(Iris-setosa)-----------------------------------------------------------------------------------------</text:p>
      <text:p text:style-name="P46">iperparametri migliori: <text:s/>{'modello__C': 0.001, 'modello__class_weight': None, 'modello__max_iter': 1000, 'modello__penalty': 'l2', 'modello__solver': 'liblinear', 'modello__tol': 0.0001}</text:p>
      <text:p text:style-name="P46">accuratezza del modello: 1.0</text:p>
      <text:p text:style-name="P46">=============================</text:p>
      <text:p text:style-name="P46"/>
      <text:p text:style-name="P51">Mentre le altre due classi hanno ricevuto un accuratezza di 0.72 0.96. Dal momento che, <text:span text:style-name="T117">dagli appunti del dataset,</text:span> una delle classi è linearmente separabile dalle altre non è detto che si tratti di un caso di Overfitting ma per <text:span text:style-name="T111">sicurezza ho ritenuto opportuno testare il modello con i dati di testing sul quale non è stato allenato. <text:s/></text:span><text:span text:style-name="T139">(vedere il file di log per tutti i risultati...)</text:span></text:p>
      <text:p text:style-name="P51"/>
      <text:p text:style-name="P48">Dal testing risulta un accuratezza di 0.95; come prima ipotesi mi sembra corretto dire che la classe “Iris-setosa” sia <text:span text:style-name="T112">tra le tre </text:span>quella linearmente separabile dalle altre; tuttavia un punteggio di 0.96 della classe “Iris-virigni<text:span text:style-name="T140">c</text:span>a” <text:span text:style-name="T118">(ottenuto in cross validation)</text:span> è sospetto <text:span text:style-name="T119">per una classe che non dovrebbe esserlo</text:span>. Ho deciso di testare con il dataset di testing anche questa classe per vedere se l’accuratezza scende.</text:p>
      <text:p text:style-name="P52">(questi due test si trovano commentati in fondo al file main.py)</text:p>
      <text:p text:style-name="P48"><text:line-break/><text:span text:style-name="T113">Alla fine del test sul modello virginica ho ottenuto un accuratezza dello 0.</text:span><text:span text:style-name="T114">64</text:span><text:span text:style-name="T113">; ne deduco che questa classe non sia </text:span><text:span text:style-name="T115">perfettamente </text:span><text:span text:style-name="T113">separabile </text:span><text:span text:style-name="T115">linearmente</text:span><text:span text:style-name="T113"> dalle altre.</text:span></text:p>
      <text:p text:style-name="P38"/>
      <text:p text:style-name="P39">Conclusion<text:span text:style-name="T149">e</text:span><text:span text:style-name="T69">–</text:span> <text:span text:style-name="T69">Dopo la cross validation il modello più performante per la classe ‘</text:span><text:span text:style-name="T70">Iris-</text:span><text:span text:style-name="T71">v</text:span><text:span text:style-name="T69">irgini</text:span><text:span text:style-name="T74">c</text:span><text:span text:style-name="T69">a’ è si l’SVC ma è stato selezionato un kernel lineare. Questa classe </text:span><text:span text:style-name="T72">sembra a prima vista linearmente separabile dalle altre; tuttavia quando abbiamo testato sul dataset di testing abbiamo ottenuto un accuratezza bassa (0.64) </text:span><text:span text:style-name="T73">inoltre lo stesso provider del dataset ci ha avvisato che solo una classe è linearmente separabile dalle altre.</text:span></text:p>
      <text:p text:style-name="P56"><text:soft-page-break/><text:span text:style-name="T15">In conclusione sembra che ‘Iris-se</text:span><text:span text:style-name="T19">t</text:span><text:span text:style-name="T15">osa’ si trovi lontana dalle altre due classi </text:span><text:span text:style-name="T20">nello spazio delle featuers</text:span><text:span text:style-name="T15"> e sia facimente separabile linearmente da entrambe mentre ‘Iris-versicolor’ e ‘Iris-virginica’ siano vicine e non linearmente separabili. </text:span><text:span text:style-name="T18">Il cross validation ci ha dato un accuratezza alta e ci ha proposto un modello lineare per ‘Iris-virginica’ perché nel 1-vs-all il modello ha riconoscuto correttamente tutti i sample di ‘Iris-setosa’ e quelli più lontani di ‘Iris-versicolor’ ma questo risultato potrebbe essere forviante: un sample di ‘</text:span><text:span text:style-name="T95">Iris-versicolor’ potrebbe confondere il modello virginica; la mia speranza è che il modello versicolor </text:span><text:span text:style-name="T100">(SVC non lineare) </text:span><text:span text:style-name="T95">invece distingua sufficientemente bene i pro</text:span><text:span text:style-name="T103">pr</text:span><text:span text:style-name="T95">i sample da quelli di ‘Iris-virginica’.</text:span></text:p>
      <text:p text:style-name="P56"><text:span text:style-name="T95"/></text:p>
      <text:p text:style-name="P57"><text:span text:style-name="T95">R</text:span><text:span text:style-name="T94">imango dell’idea che sia opportuno per il 1-vs-all tenere per ‘Iris-virginica’ un modello lineare sperando che il modello di ‘Iris-versicolor’ discrimini sufficientemente questi sample di mezzo, </text:span><text:span text:style-name="T101">confermando così la soluzione trovata durante il cross validation.</text:span></text:p>
      <text:p text:style-name="P57"><text:span text:style-name="T94"/></text:p>
      <text:p text:style-name="P73">Classe<text:tab/><text:tab/><text:tab/><text:tab/>modello<text:tab/><text:tab/><text:tab/><text:tab/><text:tab/>punteggio CV</text:p>
      <text:p text:style-name="P58"><text:span text:style-name="T94">‘</text:span><text:span text:style-name="T96">Iris-setosa</text:span><text:span text:style-name="T94">’<text:tab/><text:tab/><text:tab/></text:span><text:span text:style-name="T97">LogReg </text:span><text:span text:style-name="T99">(solver lineare)<text:tab/><text:tab/></text:span><text:span text:style-name="T102">1.0</text:span></text:p>
      <text:p text:style-name="P58"><text:span text:style-name="T94">‘</text:span><text:span text:style-name="T96">Iris-verticolor</text:span><text:span text:style-name="T94">’<text:tab/><text:tab/></text:span><text:span text:style-name="T97">SVC </text:span><text:span text:style-name="T98">kernel </text:span><text:span text:style-name="T97">non lineare<text:tab/><text:tab/></text:span><text:span text:style-name="T102">0.98</text:span></text:p>
      <text:p text:style-name="P58"><text:span text:style-name="T94">‘</text:span><text:span text:style-name="T96">Iris-virginica</text:span><text:span text:style-name="T94">’<text:tab/><text:tab/></text:span><text:span text:style-name="T97">SVC </text:span><text:span text:style-name="T98">kernel </text:span><text:span text:style-name="T97">lineare<text:tab/><text:tab/><text:tab/></text:span><text:span text:style-name="T102">0.97</text:span></text:p>
      <text:p text:style-name="P48"/>
      <text:p text:style-name="P48"/>
      <text:p text:style-name="P53"><text:span text:style-name="T57">Conclusione </text:span><text:span text:style-name="T63">finale</text:span> – <text:span text:style-name="T141">Il sistema 1-vs-all </text:span><text:span text:style-name="T142">è più accurato</text:span><text:span text:style-name="T141"> del miglior modello multiclasse (0.977 vs 0.91</text:span><text:span text:style-name="T143">1</text:span><text:span text:style-name="T141">) </text:span><text:span text:style-name="T143">probabilmente perché riesce a sfruttare meglio la natura del dataset.</text:span></text:p>
      <text:p text:style-name="P54"/>
      <text:p text:style-name="P54">Vedere il file di log per tutte le metriche di classificazione</text:p>
      <text:p text:style-name="P54"/>
      <text:p text:style-name="P54"/>
      <text:p text:style-name="P54"><text:span text:style-name="T57">l'accurazetta</text:span> del modello multiclasse migliore è di: 0.91111111111</text:p>
      <text:p text:style-name="P55">la <text:span text:style-name="T57">precisione</text:span> del modello multiclasse migliore è di: </text:p>
      <text:p text:style-name="P55">[1. <text:s text:c="8"/>0.86666667 0.86666667]</text:p>
      <text:p text:style-name="P55"><text:span text:style-name="T57">recall</text:span> del modello multiclasse migliore è di: </text:p>
      <text:p text:style-name="P55">[1. <text:s text:c="8"/>0.86666667 0.86666667]</text:p>
      <text:p text:style-name="P55"><text:span text:style-name="T57">f1</text:span> del modello multiclasse migliore è di: </text:p>
      <text:p text:style-name="P55">[1. <text:s text:c="8"/>0.86666667 0.86666667]</text:p>
      <text:p text:style-name="P54"/>
      <text:p text:style-name="P47">=============================</text:p>
      <text:p text:style-name="P54"/>
      <text:p text:style-name="P54"><text:span text:style-name="T57">l'accurazetta</text:span> del sistema Softmax è di: 0.9777777</text:p>
      <text:p text:style-name="P55">la <text:span text:style-name="T57">precisione</text:span> del sistema Softmax è di: </text:p>
      <text:p text:style-name="P55">[1. <text:s text:c="4"/>1. <text:s text:c="4"/>0.9375]</text:p>
      <text:p text:style-name="P55"><text:span text:style-name="T57">recall</text:span> del sistema Softmax è di: </text:p>
      <text:p text:style-name="P55">[1. <text:s text:c="8"/>0.93333333 1. <text:s text:c="7"/>]</text:p>
      <text:p text:style-name="P55"><text:span text:style-name="T57">f1</text:span> del sistema Softmax è di: </text:p>
      <text:p text:style-name="P55">[1. <text:s text:c="8"/>0.96551724 0.96774194]</text:p>
      <text:p text:style-name="P48"/>
      <text:p text:style-name="P48"/>
      <text:p text:style-name="P75"><text:span text:style-name="T64"/></text:p>
      <text:p text:style-name="P76"><text:soft-page-break/><text:span text:style-name="T64"/></text:p>
      <text:p text:style-name="P75"><text:span text:style-name="T64"><text:tab/><text:tab/>Iperparametri ottimizzati:</text:span></text:p>
      <text:p text:style-name="P49"/>
      <text:p text:style-name="P77">Questa sezione è puramente tecnica e legata alla libreria sklearn, non particolarmente interessante e significativa sulle conclusioni finali <text:span text:style-name="T151">in quanto sono ottimizzazioni prese dalla CV e non da me personalmente</text:span>. <text:span text:style-name="T150">Ho deciso di aggiungerla per completezza nella relazione finale.</text:span></text:p>
      <text:p text:style-name="P49"/>
      <text:p text:style-name="P74"><text:tab/>K-Nearest-Neighbors<text:tab/></text:p>
      <text:p text:style-name="P74"><text:span text:style-name="T69">In questo modello ottimizziamo </text:span>n_neighbors<text:span text:style-name="T69">, </text:span><text:span text:style-name="T82">se troppo piccolo tenderà ad essere troppo sensibile al rumode overfitting; se troppo grande tenderà </text:span><text:span text:style-name="T83">a </text:span><text:span text:style-name="T92">restituire</text:span><text:span text:style-name="T83"> valori poco specifici, underfitting. </text:span><text:span text:style-name="T84">L’ottimizzazione sceglie anche l’algoritmo da adottare (</text:span><text:span text:style-name="T124">algorithm</text:span><text:span text:style-name="T84">)</text:span><text:span text:style-name="T85"> e la metrica per la distanza (</text:span><text:span text:style-name="T125">metric</text:span><text:span text:style-name="T85">).</text:span></text:p>
      <text:p text:style-name="P50"/>
      <text:p text:style-name="P50"/>
      <text:p text:style-name="P74"><text:tab/><text:span text:style-name="T120">Decision Tree</text:span></text:p>
      <text:p text:style-name="P74"><text:span text:style-name="T120">max_depth </text:span><text:span text:style-name="T81">– per fissare la profondità massima dell’albero, se troppo profondo rischia di fare overfitting</text:span></text:p>
      <text:h text:style-name="Heading_20_3" text:outline-level="3"><text:span text:style-name="Source_20_Text"><text:span text:style-name="T23">min_samples_split / min_samples_leaf –</text:span></text:span><text:span text:style-name="Source_20_Text"><text:span text:style-name="T30"> </text:span></text:span><text:span text:style-name="Source_20_Text"><text:span text:style-name="T31">per fissare il numero minimo di </text:span></text:span><text:span text:style-name="Source_20_Text"><text:span text:style-name="T32">sample per dividere un nodo o che deve avere un nodo foglia</text:span></text:span></text:h>
      <text:p text:style-name="P64"><text:span text:style-name="Source_20_Text"><text:span text:style-name="T42">max_features –</text:span></text:span><text:span text:style-name="Source_20_Text"><text:span text:style-name="T33"> numero massimo di features considerate per i test</text:span></text:span></text:p>
      <text:p text:style-name="P65"><text:span text:style-name="Source_20_Text"><text:span text:style-name="T43">criterios</text:span></text:span><text:span text:style-name="Source_20_Text"><text:span text:style-name="T34"> – è il criterio di valutazione dello split</text:span></text:span></text:p>
      <text:p text:style-name="P66"><text:span text:style-name="Source_20_Text"><text:span text:style-name="T44">class_weight</text:span></text:span><text:span text:style-name="Source_20_Text"><text:span text:style-name="T35"> – il peso per ogni classe in </text:span></text:span><text:span text:style-name="Source_20_Text"><text:span text:style-name="T36">base al numero di sample nel dataset, non serve se il dataset è bilanciato come in questo caso.</text:span></text:span></text:p>
      <text:p text:style-name="P81"><text:tab/>Logistic Regression</text:p>
      <text:p text:style-name="P81"><text:span text:style-name="T152">C –</text:span><text:span text:style-name="T93"> regolazione </text:span><text:span text:style-name="T75">del modello, parametri che indica quanto penalizzare gli errori </text:span><text:span text:style-name="T76">di classificazione </text:span><text:span text:style-name="T75">durante l’addestramento; </text:span><text:span text:style-name="T77">se troppo piccolo </text:span><text:span text:style-name="T78">il modello tenderà a sbagliare troppo (underfitting); se troppo grande il modello sarà troppo rigoroso (overfitting)</text:span></text:p>
      <text:p text:style-name="P68"><text:span text:style-name="T121">p</text:span>enalty<text:span text:style-name="T69"> – è il tipo di penalità da </text:span><text:span text:style-name="T80">applicare</text:span><text:span text:style-name="T69"> ai coefficienti in modo che non siano più grandi del necessario</text:span></text:p>
      <text:p text:style-name="P69">solver<text:span text:style-name="T69"> – algoritmo di ottimizzazione dei parametri (con </text:span>max_iter<text:span text:style-name="T69"> numero massimo di iterazioni)</text:span></text:p>
      <text:p text:style-name="P70">tol<text:span text:style-name="T69"> – tolleranza nel criterio di stop </text:span></text:p>
      <text:p text:style-name="P67"><text:span text:style-name="T79"/></text:p>
      <text:p text:style-name="P67"><text:span text:style-name="T79"><text:tab/></text:span><text:span text:style-name="T122">SVC</text:span></text:p>
      <text:p text:style-name="P71">Come nella Logistic regression troviamo <text:span text:style-name="T123">la regolazione </text:span><text:span text:style-name="T57">C</text:span></text:p>
      <text:p text:style-name="P71"><text:soft-page-break/><text:span text:style-name="T57">Kernel –</text:span> tipo di kernel da applicare per trasformare il features space (<text:span text:style-name="T57">gamma </text:span>che definisce l’influenza del singolo sample)</text:p>
      <text:p text:style-name="P67"><text:span text:style-name="T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14T15:13:30.849486839</dc:date>
    <meta:editing-duration>PT19H26M10S</meta:editing-duration>
    <meta:editing-cycles>238</meta:editing-cycles>
    <meta:generator>LibreOffice/24.2.7.2$Linux_X86_64 LibreOffice_project/420$Build-2</meta:generator>
    <meta:document-statistic meta:table-count="0" meta:image-count="0" meta:object-count="0" meta:page-count="7" meta:paragraph-count="100" meta:word-count="1777" meta:character-count="12242" meta:non-whitespace-character-count="10441"/>
  </office:meta>
</office:document-meta>
</file>